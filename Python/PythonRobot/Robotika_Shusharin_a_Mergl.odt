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Nimbus Sans" svg:font-family="Nimbus Sans" style:font-family-generic="swiss" style:font-pitch="variable"/>
    <style:font-face style:name="Droid Sans Fallback" svg:font-family="Droid Sans Fallback" style:font-family-generic="roman" svg:panose-1="0 0 0 0 0 0 0 0 0 0"/>
    <style:font-face style:name="Droid Sans Devanagari" svg:font-family="Droid Sans Devanagari" style:font-family-generic="roman" svg:panose-1="0 0 0 0 0 0 0 0 0 0"/>
  </office:font-face-decls>
  <office:automatic-styles>
    <text:list-style style:name="LFO1">
      <text:list-level-style-number text:level="1" style:num-list-format-name="NLF1" style:num-format="1">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0" style:family="paragraph">
      <style:paragraph-properties fo:break-before="page" fo:text-align="center" fo:margin-bottom="1.3888in" fo:line-height="115%" style:page-number="0">
        <style:tab-stops>
          <style:tab-stop style:type="left" style:position="3.9375in"/>
        </style:tab-stops>
      </style:paragraph-properties>
      <style:text-properties fo:font-size="14pt" style:font-size-asian="14pt" style:font-size-complex="14pt"/>
    </style:style>
    <style:style style:name="P2" style:parent-style-name="Normální" style:family="paragraph">
      <style:paragraph-properties fo:text-align="center" fo:margin-bottom="0in"/>
      <style:text-properties fo:font-size="14pt" style:font-size-asian="14pt" style:font-size-complex="14pt"/>
    </style:style>
    <style:style style:name="P3" style:parent-style-name="Normální" style:family="paragraph">
      <style:paragraph-properties fo:text-align="center" fo:margin-bottom="0.1666in"/>
      <style:text-properties fo:font-size="14pt" style:font-size-asian="14pt" style:font-size-complex="14pt"/>
    </style:style>
    <style:style style:name="P4" style:parent-style-name="Normální" style:family="paragraph">
      <style:paragraph-properties fo:text-align="center" fo:margin-bottom="1.3888in"/>
      <style:text-properties fo:font-size="14pt" style:font-size-asian="14pt" style:font-size-complex="14pt"/>
    </style:style>
    <style:style style:name="P5" style:parent-style-name="Normální" style:family="paragraph">
      <style:paragraph-properties fo:text-align="center" fo:margin-bottom="1.3888in"/>
      <style:text-properties fo:font-size="14pt" style:font-size-asian="14pt" style:font-size-complex="14pt"/>
    </style:style>
    <style:style style:name="TableColumn7" style:family="table-column">
      <style:table-column-properties style:column-width="1.3722in" style:use-optimal-column-width="false"/>
    </style:style>
    <style:style style:name="TableColumn8" style:family="table-column">
      <style:table-column-properties style:column-width="4.7812in" style:use-optimal-column-width="false"/>
    </style:style>
    <style:style style:name="Table6" style:family="table">
      <style:table-properties style:width="6.1534in" fo:margin-left="-0.3152in" table:align="left"/>
    </style:style>
    <style:style style:name="TableRow9" style:family="table-row">
      <style:table-row-properties style:use-optimal-row-height="false"/>
    </style:style>
    <style:style style:name="TableCell10" style:family="table-cell">
      <style:table-cell-properties fo:border="none" style:writing-mode="lr-tb" fo:padding-top="0in" fo:padding-left="0.075in" fo:padding-bottom="0in" fo:padding-right="0.075in"/>
    </style:style>
    <style:style style:name="P11" style:parent-style-name="Normální" style:family="paragraph">
      <style:paragraph-properties fo:text-align="start"/>
    </style:style>
    <style:style style:name="TableCell12" style:family="table-cell">
      <style:table-cell-properties fo:border="none" style:writing-mode="lr-tb" fo:padding-top="0in" fo:padding-left="0.075in" fo:padding-bottom="0in" fo:padding-right="0.075in"/>
    </style:style>
    <style:style style:name="P13" style:parent-style-name="Normální" style:family="paragraph">
      <style:paragraph-properties fo:text-align="start"/>
    </style:style>
    <style:style style:name="TableRow14" style:family="table-row">
      <style:table-row-properties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Normální" style:family="paragraph">
      <style:paragraph-properties fo:text-align="start"/>
    </style:style>
    <style:style style:name="TableCell17" style:family="table-cell">
      <style:table-cell-properties fo:border="none" style:writing-mode="lr-tb" fo:padding-top="0in" fo:padding-left="0.075in" fo:padding-bottom="0in" fo:padding-right="0.075in"/>
    </style:style>
    <style:style style:name="P18" style:parent-style-name="Normální" style:family="paragraph">
      <style:paragraph-properties fo:text-align="start"/>
    </style:style>
    <style:style style:name="P19" style:parent-style-name="Normální" style:family="paragraph">
      <style:paragraph-properties fo:text-align="start" fo:margin-top="1.8333in" fo:margin-bottom="0in" fo:margin-left="-0.2951in">
        <style:tab-stops>
          <style:tab-stop style:type="left" style:position="2.4611in"/>
        </style:tab-stops>
      </style:paragraph-properties>
    </style:style>
    <style:style style:name="P20" style:parent-style-name="Nadpisobsahu" style:master-page-name="MP1" style:family="paragraph">
      <style:paragraph-properties fo:break-before="page" fo:margin-left="0.3in" fo:text-indent="-0.3in">
        <style:tab-stops/>
      </style:paragraph-properties>
    </style:style>
    <style:style style:name="P21"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22" style:parent-style-name="Standardnípísmoodstavce" style:family="text">
      <style:text-properties style:font-name="Calibri" style:font-name-asian="Calibri" style:font-name-complex="Calibri" style:letter-kerning="true" style:font-size-complex="12pt" style:language-asian="cs" style:country-asian="CZ"/>
    </style:style>
    <style:style style:name="P23"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24" style:parent-style-name="Standardnípísmoodstavce" style:family="text">
      <style:text-properties style:font-name="Calibri" style:font-name-asian="Calibri" style:font-name-complex="Calibri" style:letter-kerning="true" style:font-size-complex="12pt" style:language-asian="cs" style:country-asian="CZ"/>
    </style:style>
    <style:style style:name="P25" style:parent-style-name="Obsah2" style:family="paragraph">
      <style:paragraph-properties>
        <style:tab-stops>
          <style:tab-stop style:type="left" style:position="0.5in"/>
          <style:tab-stop style:type="right" style:leader-style="dotted" style:leader-text="." style:position="5.9284in"/>
        </style:tab-stops>
      </style:paragraph-properties>
    </style:style>
    <style:style style:name="T26" style:parent-style-name="Standardnípísmoodstavce" style:family="text">
      <style:text-properties style:font-name="Calibri" style:font-name-asian="Calibri" style:font-name-complex="Calibri" style:letter-kerning="true" style:font-size-complex="12pt" style:language-asian="cs" style:country-asian="CZ"/>
    </style:style>
    <style:style style:name="P27" style:parent-style-name="Obsah2" style:family="paragraph">
      <style:paragraph-properties>
        <style:tab-stops>
          <style:tab-stop style:type="left" style:position="0.5in"/>
          <style:tab-stop style:type="right" style:leader-style="dotted" style:leader-text="." style:position="5.9284in"/>
        </style:tab-stops>
      </style:paragraph-properties>
    </style:style>
    <style:style style:name="T28" style:parent-style-name="Standardnípísmoodstavce" style:family="text">
      <style:text-properties style:font-name="Calibri" style:font-name-asian="Calibri" style:font-name-complex="Calibri" style:letter-kerning="true" style:font-size-complex="12pt" style:language-asian="cs" style:country-asian="CZ"/>
    </style:style>
    <style:style style:name="P29"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30" style:parent-style-name="Standardnípísmoodstavce" style:family="text">
      <style:text-properties style:font-name="Calibri" style:font-name-asian="Calibri" style:font-name-complex="Calibri" style:letter-kerning="true" style:font-size-complex="12pt" style:language-asian="cs" style:country-asian="CZ"/>
    </style:style>
    <style:style style:name="P31" style:parent-style-name="Obsah2" style:family="paragraph">
      <style:paragraph-properties>
        <style:tab-stops>
          <style:tab-stop style:type="left" style:position="0.5in"/>
          <style:tab-stop style:type="right" style:leader-style="dotted" style:leader-text="." style:position="5.9284in"/>
        </style:tab-stops>
      </style:paragraph-properties>
    </style:style>
    <style:style style:name="T32" style:parent-style-name="Standardnípísmoodstavce" style:family="text">
      <style:text-properties style:font-name="Calibri" style:font-name-asian="Calibri" style:font-name-complex="Calibri" style:letter-kerning="true" style:font-size-complex="12pt" style:language-asian="cs" style:country-asian="CZ"/>
    </style:style>
    <style:style style:name="P33" style:parent-style-name="Obsah2" style:family="paragraph">
      <style:paragraph-properties>
        <style:tab-stops>
          <style:tab-stop style:type="left" style:position="0.5in"/>
          <style:tab-stop style:type="right" style:leader-style="dotted" style:leader-text="." style:position="5.9284in"/>
        </style:tab-stops>
      </style:paragraph-properties>
    </style:style>
    <style:style style:name="T34" style:parent-style-name="Standardnípísmoodstavce" style:family="text">
      <style:text-properties style:font-name="Calibri" style:font-name-asian="Calibri" style:font-name-complex="Calibri" style:letter-kerning="true" style:font-size-complex="12pt" style:language-asian="cs" style:country-asian="CZ"/>
    </style:style>
    <style:style style:name="P35"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36" style:parent-style-name="Standardnípísmoodstavce" style:family="text">
      <style:text-properties style:font-name="Calibri" style:font-name-asian="Calibri" style:font-name-complex="Calibri" style:letter-kerning="true" style:font-size-complex="12pt" style:language-asian="cs" style:country-asian="CZ"/>
    </style:style>
    <style:style style:name="P37"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38" style:parent-style-name="Standardnípísmoodstavce" style:family="text">
      <style:text-properties style:font-name="Calibri" style:font-name-asian="Calibri" style:font-name-complex="Calibri" style:letter-kerning="true" style:font-size-complex="12pt" style:language-asian="cs" style:country-asian="CZ"/>
    </style:style>
    <style:style style:name="P39"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40" style:parent-style-name="Standardnípísmoodstavce" style:family="text">
      <style:text-properties style:font-name="Calibri" style:font-name-asian="Calibri" style:font-name-complex="Calibri" style:letter-kerning="true" style:font-size-complex="12pt" style:language-asian="cs" style:country-asian="CZ"/>
    </style:style>
    <style:style style:name="P41"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42" style:parent-style-name="Standardnípísmoodstavce" style:family="text">
      <style:text-properties style:font-name="Calibri" style:font-name-asian="Calibri" style:font-name-complex="Calibri" style:letter-kerning="true" style:font-size-complex="12pt" style:language-asian="cs" style:country-asian="CZ"/>
    </style:style>
    <style:style style:name="P43" style:parent-style-name="Obsah1" style:family="paragraph">
      <style:paragraph-properties>
        <style:tab-stops>
          <style:tab-stop style:type="left" style:position="0.3333in"/>
          <style:tab-stop style:type="right" style:leader-style="dotted" style:leader-text="." style:position="6.0951in"/>
        </style:tab-stops>
      </style:paragraph-properties>
    </style:style>
    <style:style style:name="T44" style:parent-style-name="Standardnípísmoodstavce" style:family="text">
      <style:text-properties style:font-name="Calibri" style:font-name-asian="Calibri" style:font-name-complex="Calibri" style:letter-kerning="true" style:font-size-complex="12pt" style:language-asian="cs" style:country-asian="CZ"/>
    </style:style>
    <style:style style:name="S2" style:family="section">
      <style:section-properties fo:margin-left="0in" fo:margin-right="0in" style:writing-mode="lr-tb"/>
    </style:style>
    <style:style style:name="P45" style:parent-style-name="Nadpis1" style:family="paragraph">
      <style:paragraph-properties fo:margin-left="0.3in" fo:text-indent="-0.3in">
        <style:tab-stops/>
      </style:paragraph-properties>
    </style:style>
    <style:style style:name="P46" style:parent-style-name="Nadpis1" style:master-page-name="MP3" style:list-style-name="LFO1" style:family="paragraph">
      <style:paragraph-properties fo:break-before="page"/>
    </style:style>
    <style:style style:name="P48" style:parent-style-name="Normální" style:family="paragraph">
      <style:paragraph-properties fo:break-before="page" fo:text-align="start" fo:margin-bottom="0in" fo:line-height="100%"/>
    </style:style>
    <style:style style:name="P49" style:parent-style-name="Normální" style:family="paragraph">
      <style:paragraph-properties fo:keep-with-next="always" fo:text-align="center"/>
    </style:style>
    <style:style style:name="P50" style:parent-style-name="Titulek" style:family="paragraph">
      <style:paragraph-properties fo:text-align="center"/>
    </style:style>
    <style:style style:name="P51" style:parent-style-name="Normální" style:family="paragraph">
      <style:paragraph-properties fo:text-align="center"/>
    </style:style>
    <style:style style:name="P52" style:parent-style-name="Normální" style:family="paragraph">
      <style:paragraph-properties fo:text-align="center"/>
    </style:style>
    <style:style style:name="P53" style:parent-style-name="Titulek" style:family="paragraph">
      <style:paragraph-properties fo:text-align="center"/>
    </style:style>
    <style:style style:name="P54" style:parent-style-name="Normální" style:family="paragraph">
      <style:paragraph-properties fo:text-align="center"/>
    </style:style>
    <style:style style:name="P55" style:parent-style-name="Titulek" style:family="paragraph">
      <style:paragraph-properties fo:text-align="center"/>
    </style:style>
    <style:style style:name="P56" style:parent-style-name="Normální" style:family="paragraph">
      <style:paragraph-properties fo:text-align="center"/>
    </style:style>
    <style:style style:name="P57" style:parent-style-name="Titulek" style:family="paragraph">
      <style:paragraph-properties fo:text-align="center"/>
    </style:style>
    <style:style style:name="P58" style:parent-style-name="Normální" style:family="paragraph">
      <style:paragraph-properties fo:break-before="page" fo:text-align="start" fo:margin-bottom="0in" fo:line-height="100%"/>
    </style:style>
    <style:style style:name="P59" style:parent-style-name="Normální" style:family="paragraph">
      <style:paragraph-properties fo:keep-with-next="always" fo:text-align="center"/>
    </style:style>
    <style:style style:name="P60" style:parent-style-name="Titulek" style:family="paragraph">
      <style:paragraph-properties fo:text-align="center"/>
    </style:style>
    <style:style style:name="P61" style:parent-style-name="Normální" style:family="paragraph">
      <style:paragraph-properties fo:break-before="page" fo:text-align="start" fo:margin-bottom="0in" fo:line-height="100%"/>
    </style:style>
    <style:style style:name="P62" style:parent-style-name="Normální" style:family="paragraph">
      <style:paragraph-properties fo:text-align="center"/>
    </style:style>
    <style:style style:name="P63" style:parent-style-name="Titulek" style:family="paragraph">
      <style:paragraph-properties fo:text-align="center"/>
    </style:style>
    <style:style style:name="P64" style:parent-style-name="Normální" style:family="paragraph">
      <style:paragraph-properties fo:keep-with-next="always" fo:text-align="center"/>
    </style:style>
    <style:style style:name="P65" style:parent-style-name="Titulek" style:family="paragraph">
      <style:paragraph-properties fo:text-align="center"/>
    </style:style>
    <style:style style:name="P66" style:parent-style-name="Normální" style:family="paragraph">
      <style:paragraph-properties fo:break-before="page" fo:text-align="start" fo:margin-bottom="0in" fo:line-height="100%"/>
    </style:style>
    <style:style style:name="P67" style:parent-style-name="Normální" style:family="paragraph">
      <style:paragraph-properties fo:keep-with-next="always" fo:text-align="center"/>
    </style:style>
    <style:style style:name="P68" style:parent-style-name="Titulek" style:family="paragraph">
      <style:paragraph-properties fo:text-align="center"/>
    </style:style>
    <style:style style:name="P69" style:parent-style-name="Normální" style:family="paragraph">
      <style:paragraph-properties fo:break-before="page" fo:text-align="start" fo:margin-bottom="0in" fo:line-height="100%"/>
    </style:style>
    <style:style style:name="P70" style:parent-style-name="Normální" style:family="paragraph">
      <style:paragraph-properties fo:keep-with-next="always" fo:text-align="center"/>
    </style:style>
    <style:style style:name="P71" style:parent-style-name="Titulek" style:family="paragraph">
      <style:paragraph-properties fo:text-align="center"/>
    </style:style>
    <style:style style:name="P72" style:parent-style-name="Normální" style:family="paragraph">
      <style:paragraph-properties fo:keep-with-next="always" fo:text-align="center"/>
    </style:style>
    <style:style style:name="P73" style:parent-style-name="Titulek" style:family="paragraph">
      <style:paragraph-properties fo:text-align="center"/>
    </style:style>
    <style:style style:name="P74" style:parent-style-name="Normální" style:family="paragraph">
      <style:paragraph-properties fo:break-before="page" fo:text-align="start" fo:margin-bottom="0in" fo:line-height="100%"/>
    </style:style>
    <style:style style:name="P75" style:parent-style-name="Normální" style:family="paragraph">
      <style:paragraph-properties fo:keep-with-next="always" fo:text-align="center"/>
    </style:style>
    <style:style style:name="P76" style:parent-style-name="Titulek" style:family="paragraph">
      <style:paragraph-properties fo:text-align="center"/>
    </style:style>
    <style:style style:name="P77" style:parent-style-name="Normální" style:family="paragraph">
      <style:paragraph-properties fo:keep-with-next="always" fo:text-align="center"/>
    </style:style>
    <style:style style:name="P78" style:parent-style-name="Titulek" style:family="paragraph">
      <style:paragraph-properties fo:text-align="center"/>
    </style:style>
    <style:style style:name="P79" style:parent-style-name="Normální" style:family="paragraph">
      <style:paragraph-properties fo:break-before="page" fo:text-align="center"/>
    </style:style>
    <style:style style:name="P80" style:parent-style-name="Titulek" style:family="paragraph">
      <style:paragraph-properties fo:text-align="center"/>
    </style:style>
    <style:style style:name="P81" style:parent-style-name="Normální" style:family="paragraph">
      <style:paragraph-properties fo:text-align="center"/>
    </style:style>
    <style:style style:name="P82" style:parent-style-name="Titulek" style:family="paragraph">
      <style:paragraph-properties fo:text-align="center"/>
    </style:style>
    <style:style style:name="P83" style:parent-style-name="Normální" style:family="paragraph">
      <style:paragraph-properties fo:keep-with-next="always" fo:text-align="center"/>
    </style:style>
    <style:style style:name="P84" style:parent-style-name="Titulek" style:family="paragraph">
      <style:paragraph-properties fo:text-align="center"/>
    </style:style>
    <style:style style:name="P85" style:parent-style-name="Normální" style:family="paragraph">
      <style:paragraph-properties fo:keep-with-next="always" fo:text-align="center"/>
    </style:style>
    <style:style style:name="P86" style:parent-style-name="Titulek" style:family="paragraph">
      <style:paragraph-properties fo:text-align="center"/>
    </style:style>
    <style:style style:name="P87" style:parent-style-name="Normální" style:family="paragraph">
      <style:paragraph-properties fo:break-before="page" fo:text-align="start" fo:margin-bottom="0in" fo:line-height="100%"/>
    </style:style>
    <style:style style:name="P88" style:parent-style-name="Normální" style:family="paragraph">
      <style:paragraph-properties fo:keep-with-next="always" fo:text-align="center"/>
    </style:style>
    <style:style style:name="P89" style:parent-style-name="Titulek" style:family="paragraph">
      <style:paragraph-properties fo:text-align="center"/>
    </style:style>
    <style:style style:name="P90" style:parent-style-name="Normální" style:family="paragraph">
      <style:paragraph-properties fo:keep-with-next="always" fo:text-align="center"/>
    </style:style>
    <style:style style:name="P91" style:parent-style-name="Titulek" style:family="paragraph">
      <style:paragraph-properties fo:text-align="center"/>
    </style:style>
    <style:style style:name="P92" style:parent-style-name="Normální" style:family="paragraph">
      <style:paragraph-properties fo:break-before="page" fo:text-align="start" fo:margin-bottom="0in" fo:line-height="100%"/>
    </style:style>
    <style:style style:name="P93" style:parent-style-name="Normální" style:family="paragraph">
      <style:paragraph-properties fo:text-align="center"/>
    </style:style>
    <style:style style:name="P94" style:parent-style-name="Titulek" style:family="paragraph">
      <style:paragraph-properties fo:text-align="center"/>
    </style:style>
    <style:style style:name="P95" style:parent-style-name="Normální" style:family="paragraph">
      <style:paragraph-properties fo:break-before="page" fo:text-align="start" fo:margin-bottom="0in" fo:line-height="100%"/>
    </style:style>
    <style:style style:name="P96" style:parent-style-name="Normální" style:family="paragraph">
      <style:paragraph-properties fo:keep-with-next="always" fo:text-align="center"/>
    </style:style>
    <style:style style:name="P97" style:parent-style-name="Titulek" style:family="paragraph">
      <style:paragraph-properties fo:text-align="center"/>
    </style:style>
    <style:style style:name="P98" style:parent-style-name="Normální" style:family="paragraph">
      <style:paragraph-properties fo:keep-with-next="always" fo:text-align="center" fo:margin-bottom="0in" fo:line-height="100%"/>
    </style:style>
    <style:style style:name="P99" style:parent-style-name="Titulek" style:family="paragraph">
      <style:paragraph-properties fo:text-align="center"/>
    </style:style>
    <style:style style:name="P100" style:parent-style-name="Normální" style:family="paragraph">
      <style:paragraph-properties fo:keep-with-next="always" fo:text-align="center" fo:margin-bottom="0in" fo:line-height="100%"/>
    </style:style>
    <style:style style:name="P101" style:parent-style-name="Titulek" style:family="paragraph">
      <style:paragraph-properties fo:text-align="center"/>
    </style:style>
    <style:style style:name="P102" style:parent-style-name="Normální" style:family="paragraph">
      <style:paragraph-properties fo:keep-with-next="always" fo:text-align="center" fo:margin-bottom="0in" fo:line-height="100%"/>
    </style:style>
    <style:style style:name="P103" style:parent-style-name="Titulek" style:family="paragraph">
      <style:paragraph-properties fo:text-align="center"/>
    </style:style>
    <style:style style:name="P104" style:parent-style-name="Normální" style:family="paragraph">
      <style:paragraph-properties fo:keep-with-next="always" fo:text-align="center" fo:margin-bottom="0in" fo:line-height="100%"/>
    </style:style>
    <style:style style:name="P105" style:parent-style-name="Titulek" style:family="paragraph">
      <style:paragraph-properties fo:text-align="center"/>
    </style:style>
    <style:style style:name="P106" style:parent-style-name="Normální" style:family="paragraph">
      <style:paragraph-properties fo:break-before="page" fo:text-align="start" fo:margin-bottom="0in" fo:line-height="100%"/>
    </style:style>
    <style:style style:name="P107" style:parent-style-name="Normální" style:family="paragraph">
      <style:paragraph-properties fo:keep-with-next="always" fo:text-align="center"/>
    </style:style>
    <style:style style:name="P108" style:parent-style-name="Titulek" style:family="paragraph">
      <style:paragraph-properties fo:text-align="center"/>
    </style:style>
    <style:style style:name="P109" style:parent-style-name="Normální" style:family="paragraph">
      <style:paragraph-properties fo:keep-with-next="always" fo:text-align="center"/>
    </style:style>
    <style:style style:name="P110" style:parent-style-name="Titulek" style:family="paragraph">
      <style:paragraph-properties fo:text-align="center"/>
    </style:style>
    <style:style style:name="P111" style:parent-style-name="Normální" style:family="paragraph">
      <style:paragraph-properties fo:keep-with-next="always" fo:text-align="center"/>
    </style:style>
    <style:style style:name="P112" style:parent-style-name="Titulek" style:family="paragraph">
      <style:paragraph-properties fo:text-align="center"/>
    </style:style>
    <style:style style:name="P113" style:parent-style-name="Normální" style:family="paragraph">
      <style:paragraph-properties fo:keep-with-next="always" fo:text-align="center"/>
    </style:style>
    <style:style style:name="P114" style:parent-style-name="Titulek" style:family="paragraph">
      <style:paragraph-properties fo:text-align="center"/>
    </style:style>
    <style:style style:name="P115" style:parent-style-name="Normální" style:family="paragraph">
      <style:paragraph-properties fo:break-before="page" fo:text-align="start" fo:margin-bottom="0in" fo:line-height="100%"/>
    </style:style>
    <style:style style:name="P116" style:parent-style-name="Normální" style:family="paragraph">
      <style:paragraph-properties fo:keep-with-next="always" fo:text-align="center"/>
    </style:style>
    <style:style style:name="P117" style:parent-style-name="Titulek" style:family="paragraph">
      <style:paragraph-properties fo:text-align="center"/>
    </style:style>
    <style:style style:name="P118" style:parent-style-name="Normální" style:family="paragraph">
      <style:paragraph-properties fo:break-before="page" fo:text-align="start" fo:margin-bottom="0in" fo:line-height="100%"/>
    </style:style>
    <style:style style:name="P119" style:parent-style-name="Normální" style:family="paragraph">
      <style:paragraph-properties fo:break-before="page" fo:text-align="start" fo:margin-bottom="0in" fo:line-height="100%"/>
    </style:style>
    <style:style style:name="P120" style:parent-style-name="Normální" style:family="paragraph">
      <style:paragraph-properties fo:break-before="page" fo:text-align="start" fo:margin-bottom="0in" fo:line-height="100%"/>
    </style:style>
    <style:style style:name="T121" style:parent-style-name="Standardnípísmoodstavce" style:family="text">
      <style:text-properties fo:language="en" fo:country="CA"/>
    </style:style>
    <style:style style:name="T122" style:parent-style-name="Standardnípísmoodstavce" style:family="text">
      <style:text-properties fo:language="en" fo:country="CA"/>
    </style:style>
    <style:style style:name="T123" style:parent-style-name="Standardnípísmoodstavce" style:family="text">
      <style:text-properties fo:language="en" fo:country="CA"/>
    </style:style>
    <style:style style:name="T124" style:parent-style-name="Standardnípísmoodstavce" style:family="text">
      <style:text-properties fo:language="en" fo:country="CA"/>
    </style:style>
    <style:style style:name="P125" style:parent-style-name="Normální" style:family="paragraph">
      <style:paragraph-properties fo:break-before="page" fo:text-align="start" fo:margin-bottom="0in" fo:line-height="100%"/>
    </style:style>
    <style:style style:name="P126" style:parent-style-name="Seznamobrázků" style:family="paragraph">
      <style:paragraph-properties>
        <style:tab-stops>
          <style:tab-stop style:type="right" style:leader-style="dotted" style:leader-text="." style:position="6.2923in"/>
        </style:tab-stops>
      </style:paragraph-properties>
    </style:style>
    <style:style style:name="P127" style:parent-style-name="Seznamobrázků" style:family="paragraph">
      <style:paragraph-properties>
        <style:tab-stops>
          <style:tab-stop style:type="right" style:leader-style="dotted" style:leader-text="." style:position="6.2923in"/>
        </style:tab-stops>
      </style:paragraph-properties>
    </style:style>
    <style:style style:name="P128" style:parent-style-name="Seznamobrázků" style:family="paragraph">
      <style:paragraph-properties>
        <style:tab-stops>
          <style:tab-stop style:type="right" style:leader-style="dotted" style:leader-text="." style:position="6.2923in"/>
        </style:tab-stops>
      </style:paragraph-properties>
    </style:style>
    <style:style style:name="P129" style:parent-style-name="Seznamobrázků" style:family="paragraph">
      <style:paragraph-properties>
        <style:tab-stops>
          <style:tab-stop style:type="right" style:leader-style="dotted" style:leader-text="." style:position="6.2923in"/>
        </style:tab-stops>
      </style:paragraph-properties>
    </style:style>
    <style:style style:name="P130" style:parent-style-name="Seznamobrázků" style:family="paragraph">
      <style:paragraph-properties>
        <style:tab-stops>
          <style:tab-stop style:type="right" style:leader-style="dotted" style:leader-text="." style:position="6.2923in"/>
        </style:tab-stops>
      </style:paragraph-properties>
    </style:style>
    <style:style style:name="P131" style:parent-style-name="Seznamobrázků" style:family="paragraph">
      <style:paragraph-properties>
        <style:tab-stops>
          <style:tab-stop style:type="right" style:leader-style="dotted" style:leader-text="." style:position="6.2923in"/>
        </style:tab-stops>
      </style:paragraph-properties>
    </style:style>
    <style:style style:name="P132" style:parent-style-name="Seznamobrázků" style:family="paragraph">
      <style:paragraph-properties>
        <style:tab-stops>
          <style:tab-stop style:type="right" style:leader-style="dotted" style:leader-text="." style:position="6.2923in"/>
        </style:tab-stops>
      </style:paragraph-properties>
    </style:style>
    <style:style style:name="P133" style:parent-style-name="Seznamobrázků" style:family="paragraph">
      <style:paragraph-properties>
        <style:tab-stops>
          <style:tab-stop style:type="right" style:leader-style="dotted" style:leader-text="." style:position="6.2923in"/>
        </style:tab-stops>
      </style:paragraph-properties>
    </style:style>
    <style:style style:name="P134" style:parent-style-name="Seznamobrázků" style:family="paragraph">
      <style:paragraph-properties>
        <style:tab-stops>
          <style:tab-stop style:type="right" style:leader-style="dotted" style:leader-text="." style:position="6.2923in"/>
        </style:tab-stops>
      </style:paragraph-properties>
    </style:style>
    <style:style style:name="P135" style:parent-style-name="Seznamobrázků" style:family="paragraph">
      <style:paragraph-properties>
        <style:tab-stops>
          <style:tab-stop style:type="right" style:leader-style="dotted" style:leader-text="." style:position="6.2923in"/>
        </style:tab-stops>
      </style:paragraph-properties>
    </style:style>
    <style:style style:name="P136" style:parent-style-name="Seznamobrázků" style:family="paragraph">
      <style:paragraph-properties>
        <style:tab-stops>
          <style:tab-stop style:type="right" style:leader-style="dotted" style:leader-text="." style:position="6.2923in"/>
        </style:tab-stops>
      </style:paragraph-properties>
    </style:style>
    <style:style style:name="P137" style:parent-style-name="Seznamobrázků" style:family="paragraph">
      <style:paragraph-properties>
        <style:tab-stops>
          <style:tab-stop style:type="right" style:leader-style="dotted" style:leader-text="." style:position="6.2923in"/>
        </style:tab-stops>
      </style:paragraph-properties>
    </style:style>
    <style:style style:name="P138" style:parent-style-name="Seznamobrázků" style:family="paragraph">
      <style:paragraph-properties>
        <style:tab-stops>
          <style:tab-stop style:type="right" style:leader-style="dotted" style:leader-text="." style:position="6.2923in"/>
        </style:tab-stops>
      </style:paragraph-properties>
    </style:style>
    <style:style style:name="P139" style:parent-style-name="Seznamobrázků" style:family="paragraph">
      <style:paragraph-properties>
        <style:tab-stops>
          <style:tab-stop style:type="right" style:leader-style="dotted" style:leader-text="." style:position="6.2923in"/>
        </style:tab-stops>
      </style:paragraph-properties>
    </style:style>
    <style:style style:name="P140" style:parent-style-name="Seznamobrázků" style:family="paragraph">
      <style:paragraph-properties>
        <style:tab-stops>
          <style:tab-stop style:type="right" style:leader-style="dotted" style:leader-text="." style:position="6.2923in"/>
        </style:tab-stops>
      </style:paragraph-properties>
    </style:style>
    <style:style style:name="P141" style:parent-style-name="Seznamobrázků" style:family="paragraph">
      <style:paragraph-properties>
        <style:tab-stops>
          <style:tab-stop style:type="right" style:leader-style="dotted" style:leader-text="." style:position="6.2923in"/>
        </style:tab-stops>
      </style:paragraph-properties>
    </style:style>
    <style:style style:name="P142" style:parent-style-name="Seznamobrázků" style:family="paragraph">
      <style:paragraph-properties>
        <style:tab-stops>
          <style:tab-stop style:type="right" style:leader-style="dotted" style:leader-text="." style:position="6.2923in"/>
        </style:tab-stops>
      </style:paragraph-properties>
    </style:style>
    <style:style style:name="P143" style:parent-style-name="Seznamobrázků" style:family="paragraph">
      <style:paragraph-properties>
        <style:tab-stops>
          <style:tab-stop style:type="right" style:leader-style="dotted" style:leader-text="." style:position="6.2923in"/>
        </style:tab-stops>
      </style:paragraph-properties>
    </style:style>
    <style:style style:name="P144" style:parent-style-name="Seznamobrázků" style:family="paragraph">
      <style:paragraph-properties>
        <style:tab-stops>
          <style:tab-stop style:type="right" style:leader-style="dotted" style:leader-text="." style:position="6.2923in"/>
        </style:tab-stops>
      </style:paragraph-properties>
    </style:style>
    <style:style style:name="P145" style:parent-style-name="Seznamobrázků" style:family="paragraph">
      <style:paragraph-properties>
        <style:tab-stops>
          <style:tab-stop style:type="right" style:leader-style="dotted" style:leader-text="." style:position="6.2923in"/>
        </style:tab-stops>
      </style:paragraph-properties>
    </style:style>
    <style:style style:name="P146" style:parent-style-name="Seznamobrázků" style:family="paragraph">
      <style:paragraph-properties>
        <style:tab-stops>
          <style:tab-stop style:type="right" style:leader-style="dotted" style:leader-text="." style:position="6.2923in"/>
        </style:tab-stops>
      </style:paragraph-properties>
    </style:style>
    <style:style style:name="P147" style:parent-style-name="Seznamobrázků" style:family="paragraph">
      <style:paragraph-properties>
        <style:tab-stops>
          <style:tab-stop style:type="right" style:leader-style="dotted" style:leader-text="." style:position="6.2923in"/>
        </style:tab-stops>
      </style:paragraph-properties>
    </style:style>
    <style:style style:name="P148" style:parent-style-name="Seznamobrázků" style:family="paragraph">
      <style:paragraph-properties>
        <style:tab-stops>
          <style:tab-stop style:type="right" style:leader-style="dotted" style:leader-text="." style:position="6.2923in"/>
        </style:tab-stops>
      </style:paragraph-properties>
    </style:style>
    <style:style style:name="P149" style:parent-style-name="Seznamobrázků" style:family="paragraph">
      <style:paragraph-properties>
        <style:tab-stops>
          <style:tab-stop style:type="right" style:leader-style="dotted" style:leader-text="." style:position="6.2923in"/>
        </style:tab-stops>
      </style:paragraph-properties>
    </style:style>
    <style:style style:name="P150" style:parent-style-name="Seznamobrázků" style:family="paragraph">
      <style:paragraph-properties>
        <style:tab-stops>
          <style:tab-stop style:type="right" style:leader-style="dotted" style:leader-text="." style:position="6.2923in"/>
        </style:tab-stops>
      </style:paragraph-properties>
    </style:style>
    <style:style style:name="P151" style:parent-style-name="Seznamobrázků" style:family="paragraph">
      <style:paragraph-properties>
        <style:tab-stops>
          <style:tab-stop style:type="right" style:leader-style="dotted" style:leader-text="." style:position="6.2923in"/>
        </style:tab-stops>
      </style:paragraph-properties>
    </style:style>
    <style:style style:name="P152" style:parent-style-name="Seznamobrázků" style:family="paragraph">
      <style:paragraph-properties>
        <style:tab-stops>
          <style:tab-stop style:type="right" style:leader-style="dotted" style:leader-text="." style:position="6.2923in"/>
        </style:tab-stops>
      </style:paragraph-properties>
    </style:style>
    <style:style style:name="P153" style:parent-style-name="Seznamobrázků" style:family="paragraph">
      <style:paragraph-properties>
        <style:tab-stops>
          <style:tab-stop style:type="right" style:leader-style="dotted" style:leader-text="." style:position="6.2923in"/>
        </style:tab-stops>
      </style:paragraph-properties>
    </style:style>
    <style:style style:name="P154" style:parent-style-name="Seznamobrázků" style:family="paragraph">
      <style:paragraph-properties>
        <style:tab-stops>
          <style:tab-stop style:type="right" style:leader-style="dotted" style:leader-text="." style:position="6.2923in"/>
        </style:tab-stops>
      </style:paragraph-properties>
    </style:style>
    <style:style style:name="P155" style:parent-style-name="Normální" style:family="paragraph">
      <style:paragraph-properties fo:text-align="start" fo:margin-bottom="0in" fo:line-height="10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VYŠŠÍ ODBORNÁ ŠKOLA A STŘEDNÍ PRŮMYSLOVÁ ŠKOLA ELEKTROTECHNICKÁ FRANTIŠKA KŘIŽÍKA, NA PŘÍKOPĚ 16, PRAHA 1</text:p>
      <text:p text:style-name="P2">ZÁVĚREČNÁ PRÁCE</text:p>
      <text:p text:style-name="P3">Z PŘEDMĚTU:</text:p>
      <text:p text:style-name="P4">Robotika</text:p>
      <text:p text:style-name="P5">Pololetní projekt</text:p>
      <table:table table:style-name="Table6">
        <table:table-columns>
          <table:table-column table:style-name="TableColumn7"/>
          <table:table-column table:style-name="TableColumn8"/>
        </table:table-columns>
        <table:table-row table:style-name="TableRow9">
          <table:table-cell table:style-name="TableCell10">
            <text:p text:style-name="P11">Jméno a příjmení:</text:p>
          </table:table-cell>
          <table:table-cell table:style-name="TableCell12">
            <text:p text:style-name="P13">Shusharin Vladyslav a Mergl Vladimír</text:p>
          </table:table-cell>
        </table:table-row>
        <table:table-row table:style-name="TableRow14">
          <table:table-cell table:style-name="TableCell15">
            <text:p text:style-name="P16">Studijní obor:<text:s/></text:p>
          </table:table-cell>
          <table:table-cell table:style-name="TableCell17">
            <text:p text:style-name="P18">Informační<text:s/>a komunikační<text:s/>technologie</text:p>
          </table:table-cell>
        </table:table-row>
      </table:table>
      <text:p text:style-name="P19">2024</text:p>
      <text:soft-page-break/>
      <text:h text:style-name="P20" text:outline-level="1">Obsah</text:h>
      <text:table-of-content text:name="_TOC0">
        <text:table-of-content-source text:outline-level="2" text:use-outline-level="true" text:use-index-marks="false" text:use-index-source-styles="tru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index-source-styles text:outline-level="1">
            <text:index-source-style text:style-name="Nadpis1"/>
          </text:index-source-styles>
        </text:table-of-content-source>
        <text:index-body>
          <text:p text:style-name="P21"><text:a xlink:href="#_Toc166617222" office:target-frame-name="_top" xlink:show="replace"><text:span text:style-name="Hypertextovýodkaz">1</text:span><text:span text:style-name="T22"><text:tab/></text:span><text:span text:style-name="Hypertextovýodkaz">Úvod</text:span><text:tab/>2</text:a></text:p>
          <text:p text:style-name="P23"><text:a xlink:href="#_Toc166617223" office:target-frame-name="_top" xlink:show="replace"><text:span text:style-name="Hypertextovýodkaz">2</text:span><text:span text:style-name="T24"><text:tab/></text:span><text:span text:style-name="Hypertextovýodkaz">Teoretická část</text:span><text:tab/>3</text:a></text:p>
          <text:p text:style-name="P25"><text:a xlink:href="#_Toc166617224" office:target-frame-name="_top" xlink:show="replace"><text:span text:style-name="Hypertextovýodkaz">2.1</text:span><text:span text:style-name="T26"><text:tab/></text:span><text:span text:style-name="Hypertextovýodkaz">Návrh konstrukce</text:span><text:tab/>3</text:a></text:p>
          <text:p text:style-name="P27"><text:a xlink:href="#_Toc166617225" office:target-frame-name="_top" xlink:show="replace"><text:span text:style-name="Hypertextovýodkaz">2.2</text:span><text:span text:style-name="T28"><text:tab/></text:span><text:span text:style-name="Hypertextovýodkaz">Vývojový diagram</text:span><text:tab/>4</text:a></text:p>
          <text:p text:style-name="P29"><text:a xlink:href="#_Toc166617226" office:target-frame-name="_top" xlink:show="replace"><text:span text:style-name="Hypertextovýodkaz">3</text:span><text:span text:style-name="T30"><text:tab/></text:span><text:span text:style-name="Hypertextovýodkaz">Praktická část</text:span><text:tab/>9</text:a></text:p>
          <text:p text:style-name="P31"><text:a xlink:href="#_Toc166617227" office:target-frame-name="_top" xlink:show="replace"><text:span text:style-name="Hypertextovýodkaz">3.1</text:span><text:span text:style-name="T32"><text:tab/></text:span><text:span text:style-name="Hypertextovýodkaz">Praktická konstrukce</text:span><text:tab/>9</text:a></text:p>
          <text:p text:style-name="P33"><text:a xlink:href="#_Toc166617228" office:target-frame-name="_top" xlink:show="replace"><text:span text:style-name="Hypertextovýodkaz">3.2</text:span><text:span text:style-name="T34"><text:tab/></text:span><text:span text:style-name="Hypertextovýodkaz">Praktická tvorba programu</text:span><text:tab/>11</text:a></text:p>
          <text:p text:style-name="P35"><text:a xlink:href="#_Toc166617229" office:target-frame-name="_top" xlink:show="replace"><text:span text:style-name="Hypertextovýodkaz">4</text:span><text:span text:style-name="T36"><text:tab/></text:span><text:span text:style-name="Hypertextovýodkaz">Manuál</text:span><text:tab/>22</text:a></text:p>
          <text:p text:style-name="P37"><text:a xlink:href="#_Toc166617230" office:target-frame-name="_top" xlink:show="replace"><text:span text:style-name="Hypertextovýodkaz">5</text:span><text:span text:style-name="T38"><text:tab/></text:span><text:span text:style-name="Hypertextovýodkaz">Závěr</text:span><text:tab/>24</text:a></text:p>
          <text:p text:style-name="P39"><text:a xlink:href="#_Toc166617231" office:target-frame-name="_top" xlink:show="replace"><text:span text:style-name="Hypertextovýodkaz">6</text:span><text:span text:style-name="T40"><text:tab/></text:span><text:span text:style-name="Hypertextovýodkaz">Seznam použitých informačních zdrojů</text:span><text:tab/>25</text:a></text:p>
          <text:p text:style-name="P41"><text:a xlink:href="#_Toc166617232" office:target-frame-name="_top" xlink:show="replace"><text:span text:style-name="Hypertextovýodkaz">7</text:span><text:span text:style-name="T42"><text:tab/></text:span><text:span text:style-name="Hypertextovýodkaz">Seznam příloh</text:span><text:tab/>26</text:a></text:p>
          <text:p text:style-name="P43"><text:a xlink:href="#_Toc166617233" office:target-frame-name="_top" xlink:show="replace"><text:span text:style-name="Hypertextovýodkaz">8</text:span><text:span text:style-name="T44"><text:tab/></text:span><text:span text:style-name="Hypertextovýodkaz">Seznam obrázků</text:span><text:tab/>26</text:a></text:p>
        </text:index-body>
      </text:table-of-content>
      <text:section text:name="Sect2" text:style-name="S2">
        <text:h text:style-name="P45" text:outline-level="1"/>
      </text:section>
      <text:h text:style-name="P46" text:outline-level="1"><text:bookmark-start text:name="_Toc166617222"/><text:soft-page-break/>Úvod<text:bookmark-end text:name="_Toc166617222"/></text:h>
      <text:p text:style-name="Normální">DnD robot neboli robot, s kterým bude uživatel bojovat, je humanoidní robot z Lega a elektrických součástek od LEGO Mindstorms. Tento robot bude mít dvě proměnné, životy uživatele a životy robota. Robot bude náhodně útočit a uživatel bude vybírat svojí akci pomoci barevných kostek, které robot bude moci detekovat barevným senzorem. Podle vybrané akce uživatele program bude vykonávat různé úkony. Když hráč například zaútočí, tak se uberou robotovi životy. Robot také například vykoná určitou animaci při jeho akci. Souboj bude probíhat jako typická RPG hra, tahově.</text:p>
      <text:p text:style-name="Normální">Byl vybrán tento nápad, protože je více zaměřený na samotný program a interakci s hráčem. Podle rozhodnutí by bylo víc zábavné, když robot vyžaduje, aby uživatel s ním interagoval, a musel se i zamyslet, jak vyhrát proti robotovi. Robot, který reaguje na výběr akcí hráče by měl dávat pocit, že robot doopravdy se brání proti uživateli.</text:p>
      <text:p text:style-name="Normální">Inspirace pochází ze stolní hry Dungeons and Dragons a všeobecných RPG her, ve kterých probíhá boj tahově. Bylo rozhodnuto, že tento styl souboje je nejlepší pro vypracování z pohledu stavení samotného robota a nenáročný pro uživatele, který si bude s tímto robotem hrát.</text:p>
      <text:p text:style-name="P48"/>
      <text:h text:style-name="Nadpis1" text:outline-level="1"><text:bookmark-start text:name="_Toc166617223"/><text:soft-page-break/>Teoretická<text:s/>část<text:bookmark-end text:name="_Toc166617223"/></text:h>
      <text:h text:style-name="Nadpis2" text:outline-level="2"><text:bookmark-start text:name="_Toc166617224"/>Návrh konstrukce<text:bookmark-end text:name="_Toc166617224"/></text:h>
      <text:p text:style-name="Normální">Robot je sestaven na dvou čtvercových nohách s EV3 programovou kostkou veprostřed. Po stranách má motory, na kterých jsou připevněny modely štítu a meče z různých součástek, které máchají při útoku na hráče. Na kostce zezadu je připevněný barevný senzor, který<text:s/>spolu fungují jako ovládání ze strany hráče. EV3 kostka je upevněna na nohách s čtvercovými chodidly, aby nemohla spadnout, poněvadž motory nejsou až tak lehké a při jejích pohybu určitě může nastat nestabilita.</text:p>
      <text:p text:style-name="P49"><draw:frame draw:style-name="a0" draw:name="Obrázek 1" text:anchor-type="as-char" svg:x="0in" svg:y="0in" svg:width="5.51374in" svg:height="3.08745in" style:rel-width="scale" style:rel-height="scale"><draw:image xlink:href="media/image1.png" xlink:type="simple" xlink:show="embed" xlink:actuate="onLoad"/><svg:title/><svg:desc/></draw:frame></text:p>
      <text:p text:style-name="P50"><text:bookmark-start text:name="_Toc166616716"/>Obrázek<text:s/>1<text:s/>- Nakreslený návrh konstrukce<text:bookmark-end text:name="_Toc166616716"/></text:p>
      <text:p text:style-name="P51"/>
      <text:h text:style-name="Nadpis2" text:outline-level="2"><text:bookmark-start text:name="_Toc166617225"/><text:soft-page-break/>Vývojový diagram<text:bookmark-end text:name="_Toc166617225"/></text:h>
      <text:p text:style-name="P52"><draw:frame draw:style-name="a1" draw:name="Obrázek 1" text:anchor-type="as-char" svg:x="0in" svg:y="0in" svg:width="5.96875in" svg:height="8.60417in" style:rel-width="scale" style:rel-height="scale"><draw:image xlink:href="media/image2.png" xlink:type="simple" xlink:show="embed" xlink:actuate="onLoad"/><svg:title/><svg:desc>Obsah obrázku text, diagram, snímek obrazovky, Plán

Popis byl vytvořen automaticky</svg:desc></draw:frame></text:p>
      <text:p text:style-name="P53"><text:bookmark-start text:name="_Toc166616717"/>Obrázek<text:s/>2<text:s/>- Celý vývojový diagram<text:bookmark-end text:name="_Toc166616717"/></text:p>
      <text:p text:style-name="Normální"/>
      <text:p text:style-name="P54"><text:bookmark-start text:name="_Toc5697607"/><text:soft-page-break/><draw:frame draw:style-name="a2" draw:name="Obrázek 1" text:anchor-type="as-char" svg:x="0in" svg:y="0in" svg:width="4.63542in" svg:height="7.69792in" style:rel-width="scale" style:rel-height="scale"><draw:image xlink:href="media/image3.png" xlink:type="simple" xlink:show="embed" xlink:actuate="onLoad"/><svg:title/><svg:desc>Obsah obrázku text, diagram, snímek obrazovky, Plán

Popis byl vytvořen automaticky</svg:desc></draw:frame></text:p>
      <text:p text:style-name="P55"><text:bookmark-start text:name="_Toc166616718"/>Obrázek<text:s/>3<text:s/>- Začátek diagramu<text:bookmark-end text:name="_Toc166616718"/></text:p>
      <text:p text:style-name="Normální">Program, před začátkem hlavního úkolu tohoto robota, se zeptá hráče pro složitost a klasu (Fighter, Mage, Priest). Při vstupu uživatel musí stisknout tlačítko, toto je pro barevný senzor, aby program nepokračoval bez vstupu uživatele. Je to tak vymyšleno, protože pořád zapnutý barevný senzor by detekoval náhodné barvy a pokračoval v programu dál, je možné, že celý program by nevhodně skončil nebo se pokazil. Toto je zajištěno u každého vstupu od uživatele.</text:p>
      <text:soft-page-break/>
      <text:p text:style-name="P56"><draw:frame draw:style-name="a3" draw:name="Obrázek 1" text:anchor-type="as-char" svg:x="0in" svg:y="0in" svg:width="5.24294in" svg:height="6.47926in" style:rel-width="scale" style:rel-height="scale"><draw:image xlink:href="media/image4.png" xlink:type="simple" xlink:show="embed" xlink:actuate="onLoad"/><svg:title/><svg:desc>Obsah obrázku text, diagram, Plán, skica

Popis byl vytvořen automaticky</svg:desc></draw:frame></text:p>
      <text:p text:style-name="P57"><text:bookmark-start text:name="_Toc166616719"/>Obrázek<text:s/>4<text:s/>- Tah hráče v diagramu<text:bookmark-end text:name="_Toc166616719"/></text:p>
      <text:p text:style-name="Normální">Potom program začne s hlavním úkolem. Boj probíhá tahově, takže po každým tahu hráče a tahu robota se program v této části opakuje. Nejprve se budou vypisovat hodnoty na malou obrazovku robota ukazující životy hráče a robota a výběr pro uživatelé, kde jsou vypsané barvy napřed, aby hráč věděl, jakou barvu má ukázat. V tomto úseku jsou také funkce pro „stun“ mechaniku, která funguje jenom při složitosti „Hard“. Když je použitá schopnost (hráče nebo robota), která tuto mechaniku má, tak ten, kdo jí použil, dostane další tah. Pokud se schopnost se „stun“ mechanikou použije zase, tak „stun“ nebude fungovat, a další tah bude pro další osobu na řadě.</text:p>
      <text:p text:style-name="P58"/>
      <text:soft-page-break/>
      <text:p text:style-name="P59"><draw:frame draw:style-name="a4" draw:name="Obrázek 1" text:anchor-type="as-char" svg:x="0in" svg:y="0in" svg:width="5.41947in" svg:height="4.66549in" style:rel-width="scale" style:rel-height="scale"><draw:image xlink:href="media/image5.png" xlink:type="simple" xlink:show="embed" xlink:actuate="onLoad"/><svg:title/><svg:desc>Obsah obrázku text, diagram, řada/pruh, snímek obrazovky

Popis byl vytvořen automaticky</svg:desc></draw:frame></text:p>
      <text:p text:style-name="P60"><text:bookmark-start text:name="_Toc166616720"/>Obrázek<text:s/>5<text:s/>- Tah robota v diagramu<text:bookmark-end text:name="_Toc166616720"/></text:p>
      <text:p text:style-name="Normální">Robotův tah vypadá tak, že program vygeneruje náhodné číslo a robot použije korespondující schopnost. Robot také má menší šanci použít ultimátní schopnost. Schopnosti se také trochu mění podle vybrané složitosti. Například robot bude dělat větší poškození, nebo více útoků a „stun“. V programu jsou také vyrobeny funkce pro volání a používání daných schopností.</text:p>
      <text:p text:style-name="P61"/>
      <text:soft-page-break/>
      <text:p text:style-name="P62"><draw:frame draw:style-name="a5" draw:name="Obrázek 1" text:anchor-type="as-char" svg:x="0in" svg:y="0in" svg:width="5.14203in" svg:height="2.84056in" style:rel-width="scale" style:rel-height="scale"><draw:image xlink:href="media/image6.png" xlink:type="simple" xlink:show="embed" xlink:actuate="onLoad"/><svg:title/><svg:desc>Obsah obrázku text, diagram, řada/pruh, Plán

Popis byl vytvořen automaticky</svg:desc></draw:frame></text:p>
      <text:p text:style-name="P63"><text:bookmark-start text:name="_Toc166616721"/>Obrázek<text:s/>6<text:s/>- Konec diagramu<text:bookmark-end text:name="_Toc166616721"/></text:p>
      <text:p text:style-name="Normální">Tento cyklus běží, dokud někdo neumře. Pokud hráč zemře, tak program to vypíše a robot udělá určitou animaci a nějaký zvuk a ukončí se program. Pokud zemře robot, tak vyhraje hráč a program se zase ukončí.</text:p>
      <text:p text:style-name="P64"><draw:frame draw:style-name="a6" draw:name="Obrázek 1" text:anchor-type="as-char" svg:x="0in" svg:y="0in" svg:width="4.69649in" svg:height="3.84842in" style:rel-width="scale" style:rel-height="scale"><draw:image xlink:href="media/image7.png" xlink:type="simple" xlink:show="embed" xlink:actuate="onLoad"/><svg:title/><svg:desc>Obsah obrázku text, diagram, snímek obrazovky, Plán

Popis byl vytvořen automaticky</svg:desc></draw:frame></text:p>
      <text:p text:style-name="P65"><text:bookmark-start text:name="_Toc166616722"/>Obrázek<text:s/>7<text:s/>- Nadefinované funkce v diagramu<text:bookmark-end text:name="_Toc166616722"/></text:p>
      <text:p text:style-name="Normální">Zde jsou funkce, které v programu se využívají pro výběr hráče podle vybrané postavy a funkce pro útoky robota. Použití funkcí usnadňuje čitelnost a práci v samotným programu.<text:bookmark-start text:name="_Toc5697608"/><text:bookmark-end text:name="_Toc5697607"/></text:p>
      <text:p text:style-name="P66"/>
      <text:h text:style-name="Nadpis1" text:outline-level="1"><text:bookmark-start text:name="_Toc166617226"/><text:soft-page-break/><text:span text:style-name="IndexLink">Praktická část</text:span><text:bookmark-end text:name="_Toc166617226"/></text:h>
      <text:h text:style-name="Nadpis2" text:outline-level="2"><text:bookmark-start text:name="_Toc166617227"/>Praktická konstrukce<text:bookmark-end text:name="_Toc166617227"/></text:h>
      <text:p text:style-name="Normální">Konstrukce robota je poměrně jednoduchá a nenáročná. Robot obsahuje meč a štít připojený na dva motory ze stran, ty hýbe při určitých úkonech v souboji s uživatelem. Je postaven na čtvercované ploše, aby nespadl. Na sebe má připojené „rohy“, na kterých jsou dva senzory. Senzor barev a tlačítkový senzor pro stisk. Tlačítkový senzor a senzor barev fungují spolu jako ovládání pro uživatele, pro interakci s robotem.</text:p>
      <text:p text:style-name="Normální">Samozřejmě při konstrukci docházelo k některým složitostem, například dělání štítu robota. Štít je poskládán tak, aby robot mohl ho zvedat, tedy točit motorem k sobě. Problém byl v tom, že štít se někdy nepodařil správně sestavit, aby nebyl příliš velký. Ale největší problém byl spíš ten, že štít byl připojen tak, že se mohl točit náhodně do stran. Toto bylo vyřešeno pomoci lepšího připojení na motor pomoci trochu víc součástek.</text:p>
      <text:p text:style-name="P67"><draw:frame draw:style-name="a7" draw:name="Obrázek 1" text:anchor-type="as-char" svg:x="0in" svg:y="0in" svg:width="2.54157in" svg:height="3.38801in" style:rel-width="scale" style:rel-height="scale"><draw:image xlink:href="media/image8.jpeg" xlink:type="simple" xlink:show="embed" xlink:actuate="onLoad"/><svg:title/><svg:desc>Obsah obrázku stroj/přístroj, robot, hračka, interiér

Popis byl vytvořen automaticky</svg:desc></draw:frame></text:p>
      <text:p text:style-name="P68"><text:bookmark-start text:name="_Toc166616723"/>Obrázek<text:s/>8<text:s/>- Kabely robota seshora<text:bookmark-end text:name="_Toc166616723"/></text:p>
      <text:p text:style-name="Normální">Zde jsou připojené kabely motorů na robota. Byly vybrány kratší kabely, protože motory jsou nejblíž k jejich portům. Motory byly docela lehce připojeny na strany kostky.</text:p>
      <text:p text:style-name="P69"/>
      <text:soft-page-break/>
      <text:p text:style-name="P70"><draw:frame draw:style-name="a8" draw:name="Obrázek 2" text:anchor-type="as-char" svg:x="0in" svg:y="0in" svg:width="2.21703in" svg:height="2.95613in" style:rel-width="scale" style:rel-height="scale"><draw:image xlink:href="media/image9.jpeg" xlink:type="simple" xlink:show="embed" xlink:actuate="onLoad"/><svg:title/><svg:desc/></draw:frame></text:p>
      <text:p text:style-name="P71"><text:bookmark-start text:name="_Toc166616724"/>Obrázek<text:s/>9<text:s/>- Kabely robota zezadu<text:bookmark-end text:name="_Toc166616724"/></text:p>
      <text:p text:style-name="Normální">Zezadu jsou vidět delší kabely putující seshora dolů. Kabely senzoru jsou tedy připojené do dolních portů, proto byly vybrány delší kabely, jinak by nešlo připojit senzory ke správným portům.</text:p>
      <text:p text:style-name="Normální"/>
      <text:p text:style-name="P72"><draw:frame draw:style-name="a9" draw:name="Obrázek 4" text:anchor-type="as-char" svg:x="0in" svg:y="0in" svg:width="2.20502in" svg:height="2.94011in" style:rel-width="scale" style:rel-height="scale"><draw:image xlink:href="media/image10.jpeg" xlink:type="simple" xlink:show="embed" xlink:actuate="onLoad"/><svg:title/><svg:desc/></draw:frame></text:p>
      <text:p text:style-name="P73"><text:bookmark-start text:name="_Toc166616725"/>Obrázek<text:s/>10<text:s/>- Finální konstrukce<text:bookmark-end text:name="_Toc166616725"/></text:p>
      <text:p text:style-name="Normální">Zepředu jsou vidět všechny hlavní komponenty robota. Meč a štít na motorech a senzory pro interakci s robotem. Robot na displeji ukazuje text a hodnoty při tahovým souboji s uživatelem. Toto je konečná verze konstrukce robota.</text:p>
      <text:p text:style-name="P74"/>
      <text:h text:style-name="Nadpis2" text:outline-level="2"><text:bookmark-start text:name="_Toc166617228"/><text:soft-page-break/>Praktická tvorba programu<text:bookmark-end text:name="_Toc166617228"/></text:h>
      <text:p text:style-name="P75"><draw:frame draw:style-name="a10" draw:name="Obrázek 5" text:anchor-type="as-char" svg:x="0in" svg:y="0in" svg:width="3.09986in" svg:height="1.65269in" style:rel-width="scale" style:rel-height="scale"><draw:image xlink:href="media/image11.png" xlink:type="simple" xlink:show="embed" xlink:actuate="onLoad"/><svg:title/><svg:desc/></draw:frame></text:p>
      <text:p text:style-name="P76"><text:bookmark-start text:name="_Toc166616726"/>Obrázek<text:s/>11<text:s/>- Knihovny programu<text:bookmark-end text:name="_Toc166616726"/></text:p>
      <text:p text:style-name="P77"><draw:frame draw:style-name="a11" draw:name="Obrázek 7" text:anchor-type="as-char" svg:x="0in" svg:y="0in" svg:width="2.36334in" svg:height="3.75413in" style:rel-width="scale" style:rel-height="scale"><draw:image xlink:href="media/image12.png" xlink:type="simple" xlink:show="embed" xlink:actuate="onLoad"/><svg:title/><svg:desc/></draw:frame></text:p>
      <text:p text:style-name="P78"><text:bookmark-start text:name="_Toc166616727"/>Obrázek<text:s/>12<text:s/>- Nadefinované hodnoty<text:bookmark-end text:name="_Toc166616727"/></text:p>
      <text:p text:style-name="Normální">Na začátků kódů jsou uvedeny použité knihovny, které jsou už předepsané EV3 microPython rozšířením, ale „import time“ a „import random“ jsou manuálně napsané. Tyto dvě knihovny jsou dále v kódu využity pro určité funkce, které jsou potřebné pro tento program.</text:p>
      <text:p text:style-name="Normální">Dále jsou deklarované proměnné a zařízení, která robot využívá, korespondující k jejich fyzickému připojení. Proměnné typu „integer“ slouží v kódů hlavně jako čísla, která se mění při hlavních úkolech robota, tedy souboje (životy a mana). Některé další proměnné jsou typu „string“, které slouží k jmenování postav a schopností. Také jsou tu proměnné, které slouží k využití jako kondice v cyklech a pro ověřování určitých akcí, které uživatel bude konat, většinou jsou to proměnné typu „boolean“ (např. Enemyturn, Stun), ale také i „integer“ proměnné (např. PlayerHPFull, PlayerMANAFull).</text:p>
      <text:soft-page-break/>
      <text:p text:style-name="P79"><draw:frame draw:style-name="a12" draw:name="Obrázek 8" text:anchor-type="as-char" svg:x="0in" svg:y="0in" svg:width="3.19387in" svg:height="3.2978in" style:rel-width="scale" style:rel-height="scale"><draw:image xlink:href="media/image13.png" xlink:type="simple" xlink:show="embed" xlink:actuate="onLoad"/><svg:title/><svg:desc/></draw:frame></text:p>
      <text:p text:style-name="P80"><text:bookmark-start text:name="_Toc166616728"/>Obrázek<text:s/>13<text:s/>- Funkce postav 1<text:bookmark-end text:name="_Toc166616728"/></text:p>
      <text:p text:style-name="P81"><draw:frame draw:style-name="a13" draw:name="Obrázek 10" text:anchor-type="as-char" svg:x="0in" svg:y="0in" svg:width="2.73277in" svg:height="1.7726in" style:rel-width="scale" style:rel-height="scale"><draw:image xlink:href="media/image14.png" xlink:type="simple" xlink:show="embed" xlink:actuate="onLoad"/><svg:title/><svg:desc/></draw:frame></text:p>
      <text:p text:style-name="P82"><text:bookmark-start text:name="_Toc166616729"/>Obrázek<text:s/>14<text:s/>- Funkce postav 1 konec<text:bookmark-end text:name="_Toc166616729"/></text:p>
      <text:p text:style-name="P83"><draw:frame draw:style-name="a14" draw:name="Obrázek 11" text:anchor-type="as-char" svg:x="0in" svg:y="0in" svg:width="3.10351in" svg:height="3.0364in" style:rel-width="scale" style:rel-height="scale"><draw:image xlink:href="media/image15.png" xlink:type="simple" xlink:show="embed" xlink:actuate="onLoad"/><svg:title/><svg:desc/></draw:frame></text:p>
      <text:p text:style-name="P84"><text:bookmark-start text:name="_Toc166616730"/>Obrázek<text:s/>15<text:s/>- Funkce postav 2<text:bookmark-end text:name="_Toc166616730"/></text:p>
      <text:soft-page-break/>
      <text:p text:style-name="P85"><draw:frame draw:style-name="a15" draw:name="Obrázek 12" text:anchor-type="as-char" svg:x="0in" svg:y="0in" svg:width="3.08114in" svg:height="1.56011in" style:rel-width="scale" style:rel-height="scale"><draw:image xlink:href="media/image16.png" xlink:type="simple" xlink:show="embed" xlink:actuate="onLoad"/><svg:title/><svg:desc/></draw:frame></text:p>
      <text:p text:style-name="P86"><text:bookmark-start text:name="_Toc166616731"/>Obrázek<text:s/>16<text:s/>- Funkce postav 2 konec<text:bookmark-end text:name="_Toc166616731"/></text:p>
      <text:p text:style-name="Normální">V této části kódů jsou napsané funkce, které slouží jako schopnosti pro využití uživatelem. Jsou dvě funkce, „ability1“ a „ability2“. Tyto dvě funkce jsou dvě schopnosti, které uživatel bude mít k dispozici. Uživatel samozřejmě bude mít třetí útok, ale ten je hodně jednoduchý a využívá jenom proměnu „PlayerDMG“, takže není potřeba dělat třetí funkci. Tyto dvě funkce nejprve si zjistí pomoci funkce „if“ za jakou postavu hraje uživatel. Dále vykonají útok určený pro postavu, vypíšou text pro uživatele na displej robota a robot zahraje zvuk. Některé „if“ funkce mají i „else“ funkci, protože některé postavy mají schopnost s více výsledky podle stavu hráče nebo robota.</text:p>
      <text:p text:style-name="P87"/>
      <text:soft-page-break/>
      <text:p text:style-name="P88"><draw:frame draw:style-name="a16" draw:name="Obrázek 13" text:anchor-type="as-char" svg:x="0in" svg:y="0in" svg:width="4.42815in" svg:height="3.51712in" style:rel-width="scale" style:rel-height="scale"><draw:image xlink:href="media/image17.png" xlink:type="simple" xlink:show="embed" xlink:actuate="onLoad"/><svg:title/><svg:desc/></draw:frame></text:p>
      <text:p text:style-name="P89"><text:bookmark-start text:name="_Toc166616732"/>Obrázek<text:s/>17<text:s/>- Funkce robota<text:bookmark-end text:name="_Toc166616732"/></text:p>
      <text:p text:style-name="P90"><draw:frame draw:style-name="a17" draw:name="Obrázek 14" text:anchor-type="as-char" svg:x="0in" svg:y="0in" svg:width="3.69766in" svg:height="3.6222in" style:rel-width="scale" style:rel-height="scale"><draw:image xlink:href="media/image18.png" xlink:type="simple" xlink:show="embed" xlink:actuate="onLoad"/><svg:title/><svg:desc/></draw:frame></text:p>
      <text:p text:style-name="P91"><text:bookmark-start text:name="_Toc166616733"/>Obrázek<text:s/>18<text:s/>- Funkce robota 2<text:bookmark-end text:name="_Toc166616733"/></text:p>
      <text:p text:style-name="P92"/>
      <text:soft-page-break/>
      <text:p text:style-name="P93"><draw:frame draw:style-name="a18" draw:name="Obrázek 15" text:anchor-type="as-char" svg:x="0in" svg:y="0in" svg:width="3.45084in" svg:height="4.1588in" style:rel-width="scale" style:rel-height="scale"><draw:image xlink:href="media/image19.png" xlink:type="simple" xlink:show="embed" xlink:actuate="onLoad"/><svg:title/><svg:desc/></draw:frame></text:p>
      <text:p text:style-name="P94"><text:bookmark-start text:name="_Toc166616734"/>Obrázek<text:s/>19<text:s/>- Funkce robota 3<text:bookmark-end text:name="_Toc166616734"/></text:p>
      <text:p text:style-name="Normální">V další sekci jsou deklarované dvě důležité věci pro robota, proti kterému uživatel bojuje. První je funkce „numgenerator“, která slouží pro generování náhodného čísla, a podle čísla si robot vybere, jak bude útočit. Robot má celkem čtyři útoky, ale jeden útok je jednoduchý, takže zase se nepotřebuje funkce navíc.</text:p>
      <text:p text:style-name="Normální">Funkce „enemyability1“ a „enemyability2“ fungují v principu stejně. Nejprve se zjistí pomoci funkce „if“, jaká je složitost, protože uživatel si bude vybírat složitost souboje proti robotovi. Podle složitosti, hodnoty útoků se budou měnit. Dále se provede útok, na displej se vypíšou informace pro uživatele, robot vydá zvuk a také vykoná pohyb motorem (záleží na útoku). Robot má také funkci „enemyultimate“, což je jeho ultimátní útok, který funguje stejně jako minulé útoky, ale tentokrát vykoná pohyb oběma motory.</text:p>
      <text:p text:style-name="P95"/>
      <text:soft-page-break/>
      <text:p text:style-name="P96"><draw:frame draw:style-name="a19" draw:name="Obrázek 1" text:anchor-type="as-char" svg:x="0in" svg:y="0in" svg:width="3.0725in" svg:height="2.50503in" style:rel-width="scale" style:rel-height="scale"><draw:image xlink:href="media/image20.png" xlink:type="simple" xlink:show="embed" xlink:actuate="onLoad"/><svg:title/><svg:desc/></draw:frame></text:p>
      <text:p text:style-name="P97"><text:bookmark-start text:name="_Toc166616735"/>Obrázek<text:s/>20<text:s/>- Začátek hlavního programu<text:bookmark-end text:name="_Toc166616735"/></text:p>
      <text:p text:style-name="P98"><draw:frame draw:style-name="a20" draw:name="Obrázek 2" text:anchor-type="as-char" svg:x="0in" svg:y="0in" svg:width="2.60863in" svg:height="3.09288in" style:rel-width="scale" style:rel-height="scale"><draw:image xlink:href="media/image21.png" xlink:type="simple" xlink:show="embed" xlink:actuate="onLoad"/><svg:title/><svg:desc/></draw:frame></text:p>
      <text:p text:style-name="P99"><text:bookmark-start text:name="_Toc166616736"/>Obrázek<text:s/>21<text:s/>- Výběr složitostí<text:bookmark-end text:name="_Toc166616736"/></text:p>
      <text:p text:style-name="Normální">Na této sekci je deklarovaná hodně důležitá funkce a zde začíná hra pro hráče. Funkce „detect_color“ slouží pro uživatele pro výběr akce. Ta vrátí hodnotu typu „string“ podle toho, jaká je detekovaná barva senzorem (Red, Green, Blue). Poněvadž senzor detekuje barvy neustále v reálnem čase, většinou v kódu se bude nacházet nekonečný „while“ cyklus, který obsahuje „if“ funkci, která pustí program dál při zmáčknutí tlačítka. Po tomto „while“ cyklu se bude nacházet samotná funkce „detect_color“, která senzorem nadetekuje barvu a vrátí jí jako „string“ hodnotu.</text:p>
      <text:p text:style-name="Normální">Toto je vidět dál na těchto obrázcích. Uživatele nejprve robot uvítá a zeptá se o výběr složitosti (jsou tři složitosti). Uživatel stiskne tlačítko, nadetekuje se barva a podle toho program vybere<text:s/><text:soft-page-break/>složitost. Podle složitosti se mění životy a síla robota, také se povoluje či nepovoluje „Stun“ mechanika. Na displej se vypíše vybraná složitost a robot řekne vybranou složitost.</text:p>
      <text:p text:style-name="P100"><draw:frame draw:style-name="a21" draw:name="Obrázek 3" text:anchor-type="as-char" svg:x="0in" svg:y="0in" svg:width="3.32702in" svg:height="3.05161in" style:rel-width="scale" style:rel-height="scale"><draw:image xlink:href="media/image22.png" xlink:type="simple" xlink:show="embed" xlink:actuate="onLoad"/><svg:title/><svg:desc/></draw:frame></text:p>
      <text:p text:style-name="P101"><text:bookmark-start text:name="_Toc166616737"/>Obrázek<text:s/>22<text:s/>- Výběr postavy<text:bookmark-end text:name="_Toc166616737"/></text:p>
      <text:p text:style-name="P102"><draw:frame draw:style-name="a22" draw:name="Obrázek 4" text:anchor-type="as-char" svg:x="0in" svg:y="0in" svg:width="2.85862in" svg:height="1.73346in" style:rel-width="scale" style:rel-height="scale"><draw:image xlink:href="media/image23.png" xlink:type="simple" xlink:show="embed" xlink:actuate="onLoad"/><svg:title/><svg:desc/></draw:frame></text:p>
      <text:p text:style-name="P103"><text:bookmark-start text:name="_Toc166616738"/>Obrázek<text:s/>23<text:s/>- Výběr postavy 2<text:bookmark-end text:name="_Toc166616738"/></text:p>
      <text:p text:style-name="P104"><draw:frame draw:style-name="a23" draw:name="Obrázek 5" text:anchor-type="as-char" svg:x="0in" svg:y="0in" svg:width="3.13026in" svg:height="3.08539in" style:rel-width="scale" style:rel-height="scale"><draw:image xlink:href="media/image24.png" xlink:type="simple" xlink:show="embed" xlink:actuate="onLoad"/><svg:title/><svg:desc/></draw:frame></text:p>
      <text:p text:style-name="P105"><text:bookmark-start text:name="_Toc166616739"/>Obrázek<text:s/>24<text:s/>- Výběr postavy 3<text:bookmark-end text:name="_Toc166616739"/></text:p>
      <text:soft-page-break/>
      <text:p text:style-name="Normální">V této sekci programu si uživatel vybírá postavu. Vypíše se text a ukáže jakou barvou si uživatel by měl vybrat určitou postavu. Pro výběr jsou 3 postavy, Fighter, Mage a Priest. Zde je zase vidět zase využití tlačítka a potom detekce barev. Podle detekované barvy se nastaví postava. Pro určení postavy program si uloží její jméno do hodnoty typu „string“, která se jmenuje „Class“. Také se vypíšou názvy schopností postavy.</text:p>
      <text:p text:style-name="Normální">V této časti uživatel má také možnost se vrátit na začátek tohoto výběru. Po výběru postavy uživatel musí potvrdit výběr nebo se vrátit. Potvrzení je jedno zmáčknutí tlačítka, zatímco pro vrácení uživatel musí tlačítko podržet. Toto je uděláno pomoci „while“ cyklu s podmínkou, která se mění podle zmáčknutí tlačítka.</text:p>
      <text:p text:style-name="P106"/>
      <text:soft-page-break/>
      <text:p text:style-name="P107"><draw:frame draw:style-name="a24" draw:name="Obrázek 6" text:anchor-type="as-char" svg:x="0in" svg:y="0in" svg:width="2.64694in" svg:height="2.79743in" style:rel-width="scale" style:rel-height="scale"><draw:image xlink:href="media/image25.png" xlink:type="simple" xlink:show="embed" xlink:actuate="onLoad"/><svg:title/><svg:desc/></draw:frame></text:p>
      <text:p text:style-name="P108"><text:bookmark-start text:name="_Toc166616740"/>Obrázek<text:s/>25<text:s/>- Začátek souboje<text:bookmark-end text:name="_Toc166616740"/></text:p>
      <text:p text:style-name="P109"><draw:frame draw:style-name="a25" draw:name="Obrázek 7" text:anchor-type="as-char" svg:x="0in" svg:y="0in" svg:width="4.51755in" svg:height="2.87208in" style:rel-width="scale" style:rel-height="scale"><draw:image xlink:href="media/image26.png" xlink:type="simple" xlink:show="embed" xlink:actuate="onLoad"/><svg:title/><svg:desc/></draw:frame></text:p>
      <text:p text:style-name="P110"><text:bookmark-start text:name="_Toc166616741"/>Obrázek<text:s/>26<text:s/>- Výběr hráče<text:bookmark-end text:name="_Toc166616741"/></text:p>
      <text:p text:style-name="P111"><draw:frame draw:style-name="a26" draw:name="Obrázek 8" text:anchor-type="as-char" svg:x="0in" svg:y="0in" svg:width="3.31084in" svg:height="2.01614in" style:rel-width="scale" style:rel-height="scale"><draw:image xlink:href="media/image27.png" xlink:type="simple" xlink:show="embed" xlink:actuate="onLoad"/><svg:title/><svg:desc/></draw:frame></text:p>
      <text:p text:style-name="P112"><text:bookmark-start text:name="_Toc166616742"/>Obrázek<text:s/>27<text:s/>- Ověření tahu robota<text:bookmark-end text:name="_Toc166616742"/></text:p>
      <text:soft-page-break/>
      <text:p text:style-name="P113"><draw:frame draw:style-name="a27" draw:name="Obrázek 9" text:anchor-type="as-char" svg:x="0in" svg:y="0in" svg:width="3.51293in" svg:height="4.09573in" style:rel-width="scale" style:rel-height="scale"><draw:image xlink:href="media/image28.png" xlink:type="simple" xlink:show="embed" xlink:actuate="onLoad"/><svg:title/><svg:desc/></draw:frame></text:p>
      <text:p text:style-name="P114"><text:bookmark-start text:name="_Toc166616743"/>Obrázek<text:s/>28<text:s/>- Tah robota<text:bookmark-end text:name="_Toc166616743"/></text:p>
      <text:p text:style-name="Normální">Tato část je nejhlavnější část programu, zde uživatele vyzve robot na souboj. Souboj je ve „while“ cyklu s podmínkou, že uživatel a robot jsou naživu. Před tahem uživatele se nachází kontrola „Stun“ mechaniky, ta funguje pouze při složitosti „Hard“ a pokud robot nepoužil „Stun“ v minulém tahu, aby nedošlo k více omráčením za sebou. Tato mechanika se uplatňuje i před tahem robota a funguje stejně. Program zde koná pokyny podle detekovaných barev, tedy akce uživatele. U tahu robota se nejprve vybere číslo od 1 do 10, pokud číslo je 5, tak robot použije ultimátní útok. Pokud ne, tak se vybere číslo od 1 do 3 pomoci „numgenerator“ a robot udělá jeden ze standartních útoků. Po tahu robota se uživateli regeneruje mana a program se vrací na začátek cyklu.</text:p>
      <text:p text:style-name="P115"/>
      <text:soft-page-break/>
      <text:p text:style-name="P116"><draw:frame draw:style-name="a28" draw:name="Obrázek 10" text:anchor-type="as-char" svg:x="0in" svg:y="0in" svg:width="3.78292in" svg:height="2.00423in" style:rel-width="scale" style:rel-height="scale"><draw:image xlink:href="media/image29.png" xlink:type="simple" xlink:show="embed" xlink:actuate="onLoad"/><svg:title/><svg:desc/></draw:frame></text:p>
      <text:p text:style-name="P117"><text:bookmark-start text:name="_Toc166616744"/>Obrázek<text:s/>29<text:s/>- Konec programu<text:bookmark-end text:name="_Toc166616744"/></text:p>
      <text:p text:style-name="Normální">Pokud uživatel nebo robot zemře, tak program vyskočí z cyklu a pokračuje sem, kde zjistí, kdo vyhrál. Pokud vyhrál uživatel, tak robot řekne, že uživatel vyhrál a rozloučí se s ním. Pokud vyhrál robot, tak se uživateli vysměje a řekne, že prohrál. Potom se program ukončí. Z původního návrhu se nestihla doprogramovat a vytestovat finální animace robota.</text:p>
      <text:p text:style-name="P118"/>
      <text:h text:style-name="Nadpis1" text:outline-level="1"><text:bookmark-start text:name="_Toc166617229"/><text:soft-page-break/>Manuál<text:bookmark-end text:name="_Toc166617229"/></text:h>
      <text:p text:style-name="Normální">Robot se nejprve spustí a uvítá uživatele. Hned na začátku se zeptá pro výběr složitosti od uživatele, toto mění, jak silný robot bude a jak těžko ho bude porazit. Pro výběr možností a dalších akcí při souboji s robotem se využívá tlačítkový senzor a senzor barev. Většinou se využívají tak, že nejprve uživatel musí přiložit barvu korespondující k výběru, který je vypsán v daným momentě na displeji robota.</text:p>
      <text:p text:style-name="Normální">Existují tři složitosti, Easy, Medium a Hard. Potom se zmáčkne tlačítko a výběr se potvrdí. Toto funguje stejně v dalším kroku, kde robot se zeptá uživatele, za jakou postavu chce uživatel hrát. Na výběr jsou tři postavy, Fighter, Mage a Priest. Po výběru postavy se ukážou její názvy schopností a uživatel pro pokračování musí jenom zmáčknout tlačítko. Ale uživatel si může vybrat jinou postavu, pokud tlačítko podrží, dokud ho program nevrátí zpět k výběru postav.</text:p>
      <text:p text:style-name="Normální">Složitost mění robotovi životy a sílu, taky trochu i funkcionalitu některých jeho schopností. Při složitosti „Easy“ robot má 140 životů a 15 síly. Při složitosti „Medium“ robot má 160 životů a 20 síly. Při složitosti „Hard“ robot má 190 životů a 25 síly. Při složitosti „Hard“ je taky zapnutá mechanika „Stun“ pro omráčení, tedy přeskok tahu robota nebo uživatele.</text:p>
      <text:p text:style-name="Normální">Každá postava má jiné životy, sílu a počet many. Zde jsou jejich parametry a co dělají jejich jednotlivé schopnosti. Každá postava má 3 útoky, jeden z nich je obecný, který jenom využívá hodnotu síly a nepotřebuje manu.</text:p>
      <text:p text:style-name="Normální">Fighter obsahuje 150 životů, 20 síly a 100 many. Jeho obecný útok se jmenuje „Punch“, který ubere robotovi 20 životů. Jeho první schopnost „Brute Strength“, ta ubírá robotovi životy podle síly a navíc 15 % z původních životů uživatele a stojí 20 many. Druhá schopnost „Axe Slash“ ubírá životy podle síly a navíc 15 životů, ale pokud robot má méně jak čtvrtinu původních životů, tak ho tato schopnost hned zabije a proto stojí 25 many a omračuje robota při složitosti „Hard“.</text:p>
      <text:p text:style-name="Normální">Mage obsahuje 115 životů, 15 síly a 120 many. Obecný útok se jmenuje „Mana Beam“ a ubírá 15 životů robotovi. Jeho první schopnost „Mana Orbs“ ubírá robotovi životy podle toho kolik životů mu zbývá. Čím víc zbývajících životů, tím větší poškození. Pokud robot má pod 20 % životů, tak se ubere jenom 15. Stojí 30 many. Druhá schopnost „Light Spear“ ubere životy podle síly, a navíc podle zbývajících životů uživatele, čím víc životů tím větší poškození. Ale tato schopnost také ubere uživateli 10 životů. Tato schopnost také omračuje při složitosti „Hard“ a stojí 15 many.</text:p>
      <text:soft-page-break/>
      <text:p text:style-name="Normální">Priest obsahuje 120 životů, 10 síly a 90 many. Obecný útok se jmenuje „Curse“ a ubírá 10 životů robotovi. První schopnost „Sin Punish“ ubírá životy podle síly, a navíc podle zbývajících životů robota, čím víc životů tím větší poškození a stojí 20 many. Druhá schopnost „Blessing“ uživatele vyléčí a přidá 20 životů. Stojí také 20 many a omračuje robota při složitosti „Hard“.</text:p>
      <text:p text:style-name="Normální">Když začne souboj, tak uživatel hraje první a vybírá útoky podle tří barev (Red, Green, Blue) stejně jako u výběru složitostí a postav. Po výběru útoku se útok provede, pokud nestačí mana, uživatel musí vybrat jiný útok. Dále hraje robot, který vybírá útoky náhodně a má 10 % šanci udělat ultimátní útok. Jeho útoky mají větší poškození při větších složitostech a také obsahuje schopnost, která omračuje hráče. Robot podle schopnosti vydá zvuk a určitou animaci. „Stun“ mechanika omráčí jenom na jeden tah, a použití schopnosti s omráčením dvakrát za sebou podruhé už neomráčí. Boj skončí, když uživatel nebo robot zemře. Takhle skončí celý program.</text:p>
      <text:p text:style-name="Normální">Pokud robot nebo program nějak nefunguje, nejlépe je ho restartovat a ujistit si, že všechny součástky jsou správně zapojeny do svých portů. Začáteční pozice motoru štítu musí být tak, aby štít omylem nenarazil do samotného motoru, poněvadž se pohybuje o 60 stupňů.</text:p>
      <text:p text:style-name="P119"/>
      <text:h text:style-name="Nadpis1" text:outline-level="1"><text:bookmark-start text:name="_Toc166617230"/><text:soft-page-break/>Závěr<text:bookmark-end text:name="_Toc166617230"/></text:h>
      <text:p text:style-name="Normální">Očekávání se víceméně určitě vyplnilo až na pár věcí, se kterými se na začátku počítalo ale poté zjistilo, že do robota buď nepůjdou nebo je moc těžké je tam dát. Tato situace se odehrála například se sound efekty, které měl robot mít. V této sekci se by mohlo říct, že nejdelší a nejtěžší část realizování tohoto projektu byl samotný program, poněvadž je to nejhlavnější a největší záležitost celého projektu. Nejsnadnější byl definitivně úvod, jelikož do projektu se šlo s jasným nápadem a plánem. Podle dohodnutí by se moc úprav neudělalo, protože finální myšlenka je, že projekt je docela povedený, možná by se mělo dodat více hýbajících se částí na robota, aby byl zážitek ze hry o to zajímavější. Dodatků se k tomuto projektu dá udělat opravdu mnoho. V této verzi lze s robotem hrát pouze jednu bitvu, ale v pozdějších iteracích by robot mohl vzít roli vypravěče a hrát s vámi celou RPG hru což podle obecné logiky by bylo mnohem zajímavější pro zážitek hráče, který nejspíš má větší očekávání od novějších technologií.</text:p>
      <text:p text:style-name="P120"/>
      <text:h text:style-name="Nadpis1" text:outline-level="1"><text:bookmark-start text:name="_Toc166617231"/><text:soft-page-break/>Seznam použitých informačních zdrojů<text:bookmark-end text:name="_Toc5697608"/><text:bookmark-end text:name="_Toc166617231"/></text:h>
      <text:p text:style-name="Normální">Lego Mindstorms Education EV3 MicroPython<text:s/><text:span text:style-name="T121">[online]</text:span>.<text:s/><text:span text:style-name="T122">[</text:span>cit. 2024-5-14]</text:p>
      <text:p text:style-name="Normální">Dostupné<text:s/>v:<text:s/><text:a xlink:href="https://pybricks.com/ev3-micropython/" office:target-frame-name="_top" xlink:show="replace"><text:span text:style-name="Hypertextovýodkaz">https://pybricks.com/ev3-micropython/</text:span></text:a></text:p>
      <text:p text:style-name="Normální">Lego Mindstorms Education, Python for EV3<text:s/><text:span text:style-name="T123">[</text:span><text:span text:style-name="T124">online]. [cit. 2024-5-14]</text:span></text:p>
      <text:p text:style-name="Normální">Dostupné v:<text:s/><text:a xlink:href="https://education.lego.com/en-us/product-resources/mindstorms-ev3/teacher-resources/python-for-ev3/" office:target-frame-name="_top" xlink:show="replace"><text:span text:style-name="Hypertextovýodkaz">https://education.lego.com/en-us/product-resources/mindstorms-ev3/teacher-resources/python-for-ev3/</text:span></text:a></text:p>
      <text:p text:style-name="Normální">Pomoc od umělé inteligence s programováním, ChatGPT [online]. [cit. 2024-5-14]</text:p>
      <text:p text:style-name="Normální">Dostupné v:<text:s/><text:a xlink:href="https://chatgpt.com" office:target-frame-name="_top" xlink:show="replace"><text:span text:style-name="Hypertextovýodkaz">https://chatgpt.com</text:span></text:a></text:p>
      <text:p text:style-name="P125"/>
      <text:h text:style-name="Nadpis1" text:outline-level="1"><text:bookmark-start text:name="_Toc166617232"/><text:soft-page-break/>Seznam příloh<text:bookmark-end text:name="_Toc166617232"/></text:h>
      <text:p text:style-name="Normální">Visual Studio Code. Dostupné v:<text:s/><text:a xlink:href="https://code.visualstudio.com" office:target-frame-name="_top" xlink:show="replace"><text:span text:style-name="Hypertextovýodkaz">https://code.visualstudio.com</text:span></text:a></text:p>
      <text:p text:style-name="Normální">EV3 MicroPython rozšíření. Dostupné v prohlížeči „Extensions“ ve Visual Studio Code</text:p>
      <text:h text:style-name="Nadpis1" text:outline-level="1"><text:bookmark-start text:name="_Toc166617233"/>Seznam obrázků<text:bookmark-end text:name="_Toc166617233"/></text:h>
      <text:p text:style-name="P126"><text:a xlink:href="#_Toc166616716" office:target-frame-name="_top" xlink:show="replace"><text:span text:style-name="Hypertextovýodkaz">Obrázek 1 - Nakreslený návrh konstrukce</text:span><text:tab/>3</text:a></text:p>
      <text:p text:style-name="P127"><text:a xlink:href="#_Toc166616717" office:target-frame-name="_top" xlink:show="replace"><text:span text:style-name="Hypertextovýodkaz">Obrázek 2 - Celý vývojový diagram</text:span><text:tab/>4</text:a></text:p>
      <text:p text:style-name="P128"><text:a xlink:href="#_Toc166616718" office:target-frame-name="_top" xlink:show="replace"><text:span text:style-name="Hypertextovýodkaz">Obrázek 3 - Začátek diagramu</text:span><text:tab/>5</text:a></text:p>
      <text:p text:style-name="P129"><text:a xlink:href="#_Toc166616719" office:target-frame-name="_top" xlink:show="replace"><text:span text:style-name="Hypertextovýodkaz">Obrázek 4 - Tah hráče v diagramu</text:span><text:tab/>6</text:a></text:p>
      <text:p text:style-name="P130"><text:a xlink:href="#_Toc166616720" office:target-frame-name="_top" xlink:show="replace"><text:span text:style-name="Hypertextovýodkaz">Obrázek 5 - Tah robota v diagramu</text:span><text:tab/>7</text:a></text:p>
      <text:p text:style-name="P131"><text:a xlink:href="#_Toc166616721" office:target-frame-name="_top" xlink:show="replace"><text:span text:style-name="Hypertextovýodkaz">Obrázek 6 - Konec diagramu</text:span><text:tab/>8</text:a></text:p>
      <text:p text:style-name="P132"><text:a xlink:href="#_Toc166616722" office:target-frame-name="_top" xlink:show="replace"><text:span text:style-name="Hypertextovýodkaz">Obrázek 7 - Nadefinované funkce v diagramu</text:span><text:tab/>8</text:a></text:p>
      <text:p text:style-name="P133"><text:a xlink:href="#_Toc166616723" office:target-frame-name="_top" xlink:show="replace"><text:span text:style-name="Hypertextovýodkaz">Obrázek 8 - Kabely robota seshora</text:span><text:tab/>9</text:a></text:p>
      <text:p text:style-name="P134"><text:a xlink:href="#_Toc166616724" office:target-frame-name="_top" xlink:show="replace"><text:span text:style-name="Hypertextovýodkaz">Obrázek 9 - Kabely robota zezadu</text:span><text:tab/>10</text:a></text:p>
      <text:p text:style-name="P135"><text:a xlink:href="#_Toc166616725" office:target-frame-name="_top" xlink:show="replace"><text:span text:style-name="Hypertextovýodkaz">Obrázek 10 - Finální konstrukce</text:span><text:tab/>10</text:a></text:p>
      <text:p text:style-name="P136"><text:a xlink:href="#_Toc166616726" office:target-frame-name="_top" xlink:show="replace"><text:span text:style-name="Hypertextovýodkaz">Obrázek 11 - Knihovny programu</text:span><text:tab/>11</text:a></text:p>
      <text:p text:style-name="P137"><text:a xlink:href="#_Toc166616727" office:target-frame-name="_top" xlink:show="replace"><text:span text:style-name="Hypertextovýodkaz">Obrázek 12 - Nadefinované hodnoty</text:span><text:tab/>11</text:a></text:p>
      <text:p text:style-name="P138"><text:a xlink:href="#_Toc166616728" office:target-frame-name="_top" xlink:show="replace"><text:span text:style-name="Hypertextovýodkaz">Obrázek 13 - Funkce postav 1</text:span><text:tab/>12</text:a></text:p>
      <text:p text:style-name="P139"><text:a xlink:href="#_Toc166616729" office:target-frame-name="_top" xlink:show="replace"><text:span text:style-name="Hypertextovýodkaz">Obrázek 14 - Funkce postav 1 konec</text:span><text:tab/>12</text:a></text:p>
      <text:p text:style-name="P140"><text:a xlink:href="#_Toc166616730" office:target-frame-name="_top" xlink:show="replace"><text:span text:style-name="Hypertextovýodkaz">Obrázek 15 - Funkce postav 2</text:span><text:tab/>12</text:a></text:p>
      <text:p text:style-name="P141"><text:a xlink:href="#_Toc166616731" office:target-frame-name="_top" xlink:show="replace"><text:span text:style-name="Hypertextovýodkaz">Obrázek 16 - Funkce postav 2 konec</text:span><text:tab/>13</text:a></text:p>
      <text:p text:style-name="P142"><text:a xlink:href="#_Toc166616732" office:target-frame-name="_top" xlink:show="replace"><text:span text:style-name="Hypertextovýodkaz">Obrázek 17 - Funkce robota</text:span><text:tab/>14</text:a></text:p>
      <text:p text:style-name="P143"><text:a xlink:href="#_Toc166616733" office:target-frame-name="_top" xlink:show="replace"><text:span text:style-name="Hypertextovýodkaz">Obrázek 18 - Funkce robota 2</text:span><text:tab/>14</text:a></text:p>
      <text:p text:style-name="P144"><text:a xlink:href="#_Toc166616734" office:target-frame-name="_top" xlink:show="replace"><text:span text:style-name="Hypertextovýodkaz">Obrázek 19 - Funkce robota 3</text:span><text:tab/>15</text:a></text:p>
      <text:p text:style-name="P145"><text:a xlink:href="#_Toc166616735" office:target-frame-name="_top" xlink:show="replace"><text:span text:style-name="Hypertextovýodkaz">Obrázek 20 - Začátek hlavního programu</text:span><text:tab/>16</text:a></text:p>
      <text:p text:style-name="P146"><text:a xlink:href="#_Toc166616736" office:target-frame-name="_top" xlink:show="replace"><text:span text:style-name="Hypertextovýodkaz">Obrázek 21 - Výběr složitostí</text:span><text:tab/>16</text:a></text:p>
      <text:p text:style-name="P147"><text:a xlink:href="#_Toc166616737" office:target-frame-name="_top" xlink:show="replace"><text:span text:style-name="Hypertextovýodkaz">Obrázek 22 - Výběr postavy</text:span><text:tab/>17</text:a></text:p>
      <text:p text:style-name="P148"><text:a xlink:href="#_Toc166616738" office:target-frame-name="_top" xlink:show="replace"><text:span text:style-name="Hypertextovýodkaz">Obrázek 23 - Výběr postavy 2</text:span><text:tab/>17</text:a></text:p>
      <text:p text:style-name="P149"><text:a xlink:href="#_Toc166616739" office:target-frame-name="_top" xlink:show="replace"><text:span text:style-name="Hypertextovýodkaz">Obrázek 24 - Výběr postavy 3</text:span><text:tab/>17</text:a></text:p>
      <text:p text:style-name="P150"><text:a xlink:href="#_Toc166616740" office:target-frame-name="_top" xlink:show="replace"><text:span text:style-name="Hypertextovýodkaz">Obrázek 25 - Začátek souboje</text:span><text:tab/>19</text:a></text:p>
      <text:p text:style-name="P151"><text:a xlink:href="#_Toc166616741" office:target-frame-name="_top" xlink:show="replace"><text:span text:style-name="Hypertextovýodkaz">Obrázek 26 - Výběr hráče</text:span><text:tab/>19</text:a></text:p>
      <text:p text:style-name="P152"><text:a xlink:href="#_Toc166616742" office:target-frame-name="_top" xlink:show="replace"><text:span text:style-name="Hypertextovýodkaz">Obrázek 27 - Ověření tahu robota</text:span><text:tab/>19</text:a></text:p>
      <text:p text:style-name="P153"><text:a xlink:href="#_Toc166616743" office:target-frame-name="_top" xlink:show="replace"><text:span text:style-name="Hypertextovýodkaz">Obrázek 28 - Tah robota</text:span><text:tab/>20</text:a></text:p>
      <text:p text:style-name="P154"><text:a xlink:href="#_Toc166616744" office:target-frame-name="_top" xlink:show="replace"><text:span text:style-name="Hypertextovýodkaz">Obrázek 29 - Konec programu</text:span><text:tab/>21</text:a></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Nimbus Sans" svg:font-family="Nimbus Sans" style:font-family-generic="swiss" style:font-pitch="variable"/>
    <style:font-face style:name="Droid Sans Fallback" svg:font-family="Droid Sans Fallback" style:font-family-generic="roman" svg:panose-1="0 0 0 0 0 0 0 0 0 0"/>
    <style:font-face style:name="Droid Sans Devanagari" svg:font-family="Droid Sans Devanagari"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text-align="start"/>
      <style:text-properties style:font-name-asian="Times New Roman" fo:font-weight="bold" style:font-weight-asian="bold" style:font-weight-complex="bold" fo:font-size="14pt" style:font-size-asian="14pt" style:font-size-complex="14pt" fo:hyphenate="false"/>
    </style:style>
    <style:style style:name="Nadpis2" style:display-name="Nadpis 2" style:family="paragraph" style:parent-style-name="Normální" style:next-style-name="Normální" style:default-outline-level="2">
      <style:paragraph-properties fo:keep-with-next="always" fo:keep-together="always" fo:margin-top="0.1388in" fo:margin-bottom="0in"/>
      <style:text-properties style:font-name-asian="Times New Roman" fo:font-weight="bold" style:font-weight-asian="bold" style:font-weight-complex="bold" fo:font-size="14pt" style:font-size-asian="14pt" style:font-size-complex="13pt" fo:hyphenate="false"/>
    </style:style>
    <style:style style:name="Nadpis3" style:display-name="Nadpis 3" style:family="paragraph" style:parent-style-name="Normální" style:next-style-name="Normální" style:default-outline-level="3">
      <style:paragraph-properties fo:keep-with-next="always" fo:keep-together="always" fo:margin-top="0.1388in" fo:margin-bottom="0in"/>
      <style:text-properties style:font-name-asian="Times New Roman" fo:font-weight="bold" style:font-weight-asian="bold" style:font-weight-complex="bold" fo:hyphenate="false"/>
    </style:style>
    <style:style style:name="Nadpis4" style:display-name="Nadpis 4" style:family="paragraph" style:parent-style-name="Nadpis3" style:next-style-name="Normální" style:default-outline-level="4">
      <style:text-properties style:font-weight-complex="normal" style:font-style-complex="italic" fo:hyphenate="false"/>
    </style:style>
    <style:style style:name="Nadpis5" style:display-name="Nadpis 5" style:family="paragraph" style:parent-style-name="Normální" style:next-style-name="Normální" style:default-outline-level="5">
      <style:paragraph-properties fo:keep-with-next="always" fo:keep-together="always" fo:text-align="center" fo:margin-top="0.0833in" fo:margin-bottom="0in" fo:line-height="100%"/>
      <style:text-properties style:font-name="Cambria" style:font-name-asian="Times New Roman" fo:hyphenate="false"/>
    </style:style>
    <style:style style:name="Nadpis6" style:display-name="Nadpis 6" style:family="paragraph" style:parent-style-name="Normální" style:next-style-name="Normální"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adpis7" style:display-name="Nadpis 7" style:family="paragraph" style:parent-style-name="Normální" style:next-style-name="Normální" style:default-outline-level="7">
      <style:paragraph-properties fo:keep-with-next="always" fo:keep-together="always" fo:margin-top="0.1388in" fo:margin-bottom="0in"/>
      <style:text-properties style:font-name="Cambria" style:font-name-asian="Times New Roman" fo:font-style="italic" style:font-style-asian="italic" style:font-style-complex="italic" fo:color="#404040" fo:hyphenate="false"/>
    </style:style>
    <style:style style:name="Nadpis8" style:display-name="Nadpis 8" style:family="paragraph" style:parent-style-name="Normální" style:next-style-name="Normální" style:default-outline-level="8">
      <style:paragraph-properties fo:keep-with-next="always" fo:keep-together="always" fo:margin-top="0.1388in" fo:margin-bottom="0in"/>
      <style:text-properties style:font-name="Cambria" style:font-name-asian="Times New Roman" fo:color="#404040" fo:font-size="10pt" style:font-size-asian="10pt" style:font-size-complex="10pt" fo:hyphenate="false"/>
    </style:style>
    <style:style style:name="Nadpis9" style:display-name="Nadpis 9" style:family="paragraph" style:parent-style-name="Normální" style:next-style-name="Normální" style:default-outline-level="9">
      <style:paragraph-properties fo:keep-with-next="always" fo:keep-together="always" fo:text-align="center" fo:margin-top="0.0833in" fo:margin-bottom="0.1666in" fo:line-height="100%"/>
      <style:text-properties style:font-name-asian="Times New Roman" fo:font-style="italic" style:font-style-asian="italic" style:font-style-complex="italic" fo:font-size="9pt" style:font-size-asian="9pt" style:font-size-complex="10pt" fo:hyphenate="false"/>
    </style:style>
    <style:style style:name="Normální" style:display-name="Normální" style:family="paragraph">
      <style:paragraph-properties fo:text-align="justify" fo:margin-bottom="0.0833in" fo:line-height="150%"/>
      <style:text-properties style:font-name="Times New Roman" fo:font-size="12pt" style:font-size-asian="12pt" style:font-size-complex="11pt" style:language-asian="en" style:country-asian="US" fo:hyphenate="false"/>
    </style:style>
    <style:style style:name="Standardnípísmoodstavce" style:display-name="Standardní písmo odstavce" style:family="text"/>
    <style:style style:name="Nadpis1Char" style:display-name="Nadpis 1 Char" style:family="text">
      <style:text-properties style:font-name="Times New Roman" style:font-name-asian="Times New Roman" fo:font-weight="bold" style:font-weight-asian="bold" style:font-weight-complex="bold" fo:font-size="14pt" style:font-size-asian="14pt" style:font-size-complex="14pt" style:language-asian="en" style:country-asian="US"/>
    </style:style>
    <style:style style:name="TextbublinyChar" style:display-name="Text bubliny Char" style:family="text">
      <style:text-properties style:font-name="Tahoma" style:font-name-complex="Tahoma" fo:font-size="8pt" style:font-size-asian="8pt" style:font-size-complex="8pt"/>
    </style:style>
    <style:style style:name="ZáhlavíChar" style:display-name="Záhlaví Char" style:family="text">
      <style:text-properties style:font-name="Times New Roman" fo:font-size="12pt" style:font-size-asian="12pt"/>
    </style:style>
    <style:style style:name="ZápatíChar" style:display-name="Zápatí Char" style:family="text">
      <style:text-properties style:font-name="Times New Roman" fo:font-size="12pt" style:font-size-asian="12pt"/>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Nadpis2Char" style:display-name="Nadpis 2 Char" style:family="text">
      <style:text-properties style:font-name="Times New Roman" style:font-name-asian="Times New Roman" style:font-name-complex="Times New Roman" fo:font-weight="bold" style:font-weight-asian="bold" style:font-weight-complex="bold" fo:font-size="14pt" style:font-size-asian="14pt" style:font-size-complex="13pt"/>
    </style:style>
    <style:style style:name="Nadpis3Char" style:display-name="Nadpis 3 Char" style:family="text">
      <style:text-properties style:font-name="Times New Roman" style:font-name-asian="Times New Roman" fo:font-weight="bold" style:font-weight-asian="bold" style:font-weight-complex="bold" fo:font-size="12pt" style:font-size-asian="12pt" style:font-size-complex="11pt" style:language-asian="en" style:country-asian="US"/>
    </style:style>
    <style:style style:name="Nadpis4Char" style:display-name="Nadpis 4 Char" style:family="text">
      <style:text-properties style:font-name="Times New Roman" style:font-name-asian="Times New Roman" fo:font-weight="bold" style:font-weight-asian="bold" style:font-style-complex="italic" fo:font-size="12pt" style:font-size-asian="12pt" style:font-size-complex="11pt" style:language-asian="en" style:country-asian="US"/>
    </style:style>
    <style:style style:name="Nadpis5Char" style:display-name="Nadpis 5 Char" style:family="text">
      <style:text-properties style:font-name="Cambria" style:font-name-asian="Times New Roman" fo:font-size="12pt" style:font-size-asian="12pt" style:font-size-complex="11pt" style:language-asian="en" style:country-asian="US"/>
    </style:style>
    <style:style style:name="Nadpis6Char" style:display-name="Nadpis 6 Char" style:family="text">
      <style:text-properties style:font-name="Cambria" style:font-name-asian="Times New Roman" style:font-name-complex="Times New Roman" fo:font-style="italic" style:font-style-asian="italic" style:font-style-complex="italic" fo:color="#243F60" fo:font-size="12pt" style:font-size-asian="12pt"/>
    </style:style>
    <style:style style:name="Nadpis7Char" style:display-name="Nadpis 7 Char" style:family="text">
      <style:text-properties style:font-name="Cambria" style:font-name-asian="Times New Roman" style:font-name-complex="Times New Roman" fo:font-style="italic" style:font-style-asian="italic" style:font-style-complex="italic" fo:color="#404040" fo:font-size="12pt" style:font-size-asian="12pt"/>
    </style:style>
    <style:style style:name="Nadpis8Char" style:display-name="Nadpis 8 Char" style:family="text">
      <style:text-properties style:font-name="Cambria" style:font-name-asian="Times New Roman" style:font-name-complex="Times New Roman" fo:color="#404040" fo:font-size="10pt" style:font-size-asian="10pt" style:font-size-complex="10pt"/>
    </style:style>
    <style:style style:name="Nadpis9Char" style:display-name="Nadpis 9 Char" style:family="text">
      <style:text-properties style:font-name="Times New Roman" style:font-name-asian="Times New Roman" fo:font-style="italic" style:font-style-asian="italic" style:font-style-complex="italic" fo:font-size="9pt" style:font-size-asian="9pt" style:language-asian="en" style:country-asian="US"/>
    </style:style>
    <style:style style:name="Odkaznakomentář" style:display-name="Odkaz na komentář" style:family="text">
      <style:text-properties fo:font-size="8pt" style:font-size-asian="8pt" style:font-size-complex="8pt"/>
    </style:style>
    <style:style style:name="TextkomentářeChar" style:display-name="Text komentáře Char" style:family="text">
      <style:text-properties style:font-name="Times New Roman" fo:font-size="10pt" style:font-size-asian="10pt" style:font-size-complex="10pt"/>
    </style:style>
    <style:style style:name="PředmětkomentářeChar" style:display-name="Předmět komentáře Char" style:family="text">
      <style:text-properties style:font-name="Times New Roman" fo:font-weight="bold" style:font-weight-asian="bold" style:font-weight-complex="bold" fo:font-size="10pt" style:font-size-asian="10pt" style:font-size-complex="10pt"/>
    </style:style>
    <style:style style:name="IndexLink" style:display-name="Index Link" style:family="text"/>
    <style:style style:name="Heading" style:display-name="Heading" style:family="paragraph" style:parent-style-name="Normální" style:next-style-name="Základnítext">
      <style:paragraph-properties fo:keep-with-next="always" fo:margin-top="0.1666in"/>
      <style:text-properties style:font-name="Nimbus Sans" style:font-name-asian="Droid Sans Fallback" style:font-name-complex="Droid Sans Devanagari" fo:font-size="14pt" style:font-size-asian="14pt" style:font-size-complex="14pt" fo:hyphenate="false"/>
    </style:style>
    <style:style style:name="Základnítext" style:display-name="Základní text" style:family="paragraph" style:parent-style-name="Normální">
      <style:paragraph-properties fo:margin-bottom="0.0972in" fo:line-height="115%"/>
      <style:text-properties fo:hyphenate="false"/>
    </style:style>
    <style:style style:name="Seznam" style:display-name="Seznam" style:family="paragraph" style:parent-style-name="Základnítext">
      <style:text-properties style:font-name-complex="Droid Sans Devanagari" fo:hyphenate="false"/>
    </style:style>
    <style:style style:name="Titulek" style:display-name="Titulek" style:family="paragraph" style:parent-style-name="Normální">
      <style:paragraph-properties text:number-lines="false" fo:margin-top="0.0833in"/>
      <style:text-properties style:font-name-complex="Droid Sans Devanagari" fo:font-style="italic" style:font-style-asian="italic" style:font-style-complex="italic" style:font-size-complex="12pt" fo:hyphenate="false"/>
    </style:style>
    <style:style style:name="Index" style:display-name="Index" style:family="paragraph" style:parent-style-name="Normální">
      <style:paragraph-properties text:number-lines="false"/>
      <style:text-properties style:font-name-complex="Droid Sans Devanagari" fo:hyphenate="false"/>
    </style:style>
    <style:style style:name="Nadpisobsahu" style:display-name="Nadpis obsahu" style:family="paragraph" style:parent-style-name="Nadpis1" style:next-style-name="Normální" style:default-outline-level="1">
      <style:paragraph-properties fo:line-height="115%"/>
      <style:text-properties fo:hyphenate="false"/>
    </style:style>
    <style:style style:name="Textbubliny" style:display-name="Text bubliny" style:family="paragraph" style:parent-style-name="Normální">
      <style:paragraph-properties fo:margin-bottom="0in" fo:line-height="100%"/>
      <style:text-properties style:font-name="Tahoma" style:font-name-complex="Tahoma" fo:font-size="8pt" style:font-size-asian="8pt" style:font-size-complex="8pt" fo:hyphenate="false"/>
    </style:style>
    <style:style style:name="Bezmezer" style:display-name="Bez mezer" style:family="paragraph">
      <style:paragraph-properties fo:text-align="justify"/>
      <style:text-properties style:font-name="Times New Roman" fo:font-size="12pt" style:font-size-asian="12pt" style:font-size-complex="11pt" style:language-asian="en" style:country-asian="US" fo:hyphenate="false"/>
    </style:style>
    <style:style style:name="HeaderandFooter" style:display-name="Header and Footer" style:family="paragraph" style:parent-style-name="Normální">
      <style:text-properties fo:hyphenate="false"/>
    </style:style>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Obsah1" style:display-name="Obsah 1" style:family="paragraph" style:parent-style-name="Normální" style:next-style-name="Normální" style:auto-update="true">
      <style:paragraph-properties fo:text-align="start" fo:margin-bottom="0.0694in">
        <style:tab-stops>
          <style:tab-stop style:type="right" style:leader-style="dotted" style:leader-text="." style:position="6.0951in"/>
        </style:tab-stops>
      </style:paragraph-properties>
      <style:text-properties fo:hyphenate="false"/>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Poznámka" style:display-name="Poznámka" style:family="paragraph" style:parent-style-name="Normální">
      <style:paragraph-properties fo:line-height="130%"/>
      <style:text-properties fo:font-size="10pt" style:font-size-asian="10pt" fo:hyphenate="false"/>
    </style:style>
    <style:style style:name="Textkomentáře" style:display-name="Text komentáře" style:family="paragraph" style:parent-style-name="Normální">
      <style:paragraph-properties fo:line-height="100%"/>
      <style:text-properties fo:font-size="10pt" style:font-size-asian="10pt" style:font-size-complex="10pt" fo:hyphenate="false"/>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Obsah3" style:display-name="Obsah 3" style:family="paragraph" style:parent-style-name="Normální" style:next-style-name="Normální" style:auto-update="true">
      <style:paragraph-properties fo:margin-bottom="0.0694in" fo:margin-left="0.3333in">
        <style:tab-stops/>
      </style:paragraph-properties>
      <style:text-properties fo:hyphenate="false"/>
    </style:style>
    <style:style style:name="Seznamobrtabagraf" style:display-name="Seznam obr tab a graf" style:family="paragraph" style:parent-style-name="Normální" style:list-style-name="LFO2">
      <style:text-properties fo:font-weight="bold" style:font-weight-asian="bold" fo:font-size="14pt" style:font-size-asian="14pt" fo:hyphenate="false"/>
    </style:style>
    <style:style style:name="FrameContents" style:display-name="Frame Contents" style:family="paragraph" style:parent-style-name="Normální">
      <style:text-properties fo:hyphenate="false"/>
    </style:style>
    <style:style style:name="Normálníweb" style:display-name="Normální (web)" style:family="paragraph" style:parent-style-name="Normální">
      <style:paragraph-properties fo:text-align="start" fo:margin-top="0.0694in" fo:margin-bottom="0.0694in" fo:line-height="100%"/>
      <style:text-properties style:font-name-asian="Times New Roman" style:font-size-complex="12pt" style:language-asian="cs" style:country-asian="CZ" fo:hyphenate="true"/>
    </style:style>
    <style:style style:name="Nevyřešenázmínka" style:display-name="Nevyřešená zmínka" style:family="text" style:parent-style-name="Standardnípísmoodstavce">
      <style:text-properties fo:color="#605E5C" fo:background-color="#E1DFDD"/>
    </style:style>
    <style:style style:name="Seznamobrázků" style:display-name="Seznam obrázků" style:family="paragraph" style:parent-style-name="Normální" style:next-style-name="Normální">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0" style:num-format="1">
        <style:list-level-properties text:space-before="0.1965in" text:min-label-width="0.3in" text:list-level-position-and-space-mode="label-alignment">
          <style:list-level-label-alignment text:label-followed-by="listtab" fo:margin-left="0.4965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
    </text:outline-style>
    <text:list-style style:name="LFO2">
      <text:list-level-style-number text:level="1" style:num-list-format-name="NLF2"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list-format-name="NLF1" style:num-format="1">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6"/>
      <number:text>%1%.%2%.%3%.%4%.%5%.%6%</number:text>
      <number:num-list-label text:level="7"/>
      <number:text>%1%.%2%.%3%.%4%.%5%.%6%.%7%</number:text>
      <number:num-list-label text:level="8"/>
      <number:text>%1%.%2%.%3%.%4%.%5%.%6%.%7%.%8%</number:text>
    </number:num-list-format>
    <number:num-list-format style:name="NLF1">
      <number:num-list-label text:level="1"/>
      <number:text>%1%</number:text>
      <number:num-list-label text:level="2"/>
      <number:text>%1%.%2%</number:text>
      <number:num-list-label text:level="3"/>
      <number:text>%1%.%2%.%3%</number:text>
      <number:num-list-label text:level="4"/>
      <number:text/>
      <number:num-list-label text:level="5"/>
      <number:text/>
      <number:num-list-label text:level="6"/>
      <number:text>%1%.%2%.%3%.%4%.%5%.%6%</number:text>
      <number:num-list-label text:level="7"/>
      <number:text>%1%.%2%.%3%.%4%.%5%.%6%.%7%</number:text>
      <number:num-list-label text:level="8"/>
      <number:text>%1%.%2%.%3%.%4%.%5%.%6%.%7%.%8%</number:text>
      <number:num-list-label text:level="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1812in" fo:margin-left="1.3784in" fo:margin-bottom="0.9847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3784in" fo:margin-left="1.1812in" fo:margin-bottom="1.3784in" fo:margin-right="0.9847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9847in"/>
      </style:header-style>
      <style:footer-style>
        <style:header-footer-properties style:dynamic-spacing="true" fo:min-height="0.4923in"/>
      </style:footer-style>
    </style:page-layout>
    <style:style style:name="P47" style:parent-style-name="Zápatí" style:family="paragraph">
      <style:paragraph-properties fo:text-align="center"/>
    </style:style>
  </office:automatic-styles>
  <office:master-styles>
    <style:master-page style:name="MP0" style:page-layout-name="PL0"/>
    <style:master-page style:name="MP1" style:page-layout-name="PL1"/>
    <style:master-page style:name="MP3" style:page-layout-name="PL3">
      <style:footer>
        <text:p text:style-name="P47"><text:page-number text:fixed="false">6</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l Dudek</meta:initial-creator>
    <dc:creator>Vladyslav Shusharin</dc:creator>
    <meta:creation-date>2024-05-14T20:21:00Z</meta:creation-date>
    <dc:date>2024-05-14T20:21:00Z</dc:date>
    <meta:print-date>2013-09-01T15:11:00Z</meta:print-date>
    <meta:template xlink:href="Normal.dotm" xlink:type="simple"/>
    <meta:editing-cycles>2</meta:editing-cycles>
    <meta:editing-duration>PT0S</meta:editing-duration>
    <meta:user-defined meta:name="_MarkAsFinal" meta:value-type="boolean">true</meta:user-defined>
    <meta:document-statistic meta:page-count="28" meta:paragraph-count="43" meta:word-count="3163" meta:character-count="21782" meta:row-count="155" meta:non-whitespace-character-count="18662"/>
  </office:meta>
</office:document-meta>
</file>